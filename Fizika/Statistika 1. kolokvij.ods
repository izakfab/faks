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2.748in" svg:y="20.0854in">
            <draw:object draw:notify-on-update-of-ranges="Sheet1.J1:Sheet1.J1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634in" svg:y="20.1173in">
            <draw:object draw:notify-on-update-of-ranges="Sheet1.J2:Sheet1.J1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63250382" calcext:value-type="float">
            <text:p>6325038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$G$1:.$G$222];[.I1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250006" calcext:value-type="float">
            <text:p>6325000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G$1:.$G$222];[.I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40387" calcext:value-type="float">
            <text:p>6324038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G$1:.$G$222];[.I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008" calcext:value-type="float">
            <text:p>6325000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G$1:.$G$222];[.I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009" calcext:value-type="float">
            <text:p>6325000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G$1:.$G$222];[.I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014" calcext:value-type="float">
            <text:p>6325001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$G$1:.$G$222];[.I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016" calcext:value-type="float">
            <text:p>6325001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G$1:.$G$222];[.I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017" calcext:value-type="float">
            <text:p>632500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$G$1:.$G$222];[.I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018" calcext:value-type="float">
            <text:p>632500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$G$1:.$G$222];[.I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022" calcext:value-type="float">
            <text:p>632500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$G$1:.$G$222];[.I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025" calcext:value-type="float">
            <text:p>632500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$G$1:.$G$222];[.I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029" calcext:value-type="float">
            <text:p>6325002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$G$1:.$G$222];[.I1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30032" calcext:value-type="float">
            <text:p>6323003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$G$1:.$G$222];[.I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034" calcext:value-type="float">
            <text:p>6325003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$G$1:.$G$222];[.I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40032" calcext:value-type="float">
            <text:p>632400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$G$1:.$G$222];[.I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40380" calcext:value-type="float">
            <text:p>6324038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$G$1:.$G$222];[.I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30512" calcext:value-type="float">
            <text:p>6323051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$G$1:.$G$222];[.I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40041" calcext:value-type="float">
            <text:p>6324004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$G$1:.$G$222];[.I1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384" calcext:value-type="float">
            <text:p>6325038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$G$1:.$G$222];[.I1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50385" calcext:value-type="float">
            <text:p>6325038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$G$1:.$G$222];[.I2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40045" calcext:value-type="float">
            <text:p>632400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$G$1:.$G$222];[.I2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3250041" calcext:value-type="float">
            <text:p>6325004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$G$1:.$G$222];[.I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043" calcext:value-type="float">
            <text:p>6325004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$G$1:.$G$222];[.I2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50478" calcext:value-type="float">
            <text:p>6325047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$G$1:.$G$222];[.I2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3250479" calcext:value-type="float">
            <text:p>6325047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$G$1:.$G$222];[.I2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50045" calcext:value-type="float">
            <text:p>6325004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$G$1:.$G$222];[.I2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50047" calcext:value-type="float">
            <text:p>6325004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$G$1:.$G$222];[.I2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50048" calcext:value-type="float">
            <text:p>632500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$G$1:.$G$222];[.I2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372" calcext:value-type="float">
            <text:p>6325037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$G$1:.$G$222];[.I2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40058" calcext:value-type="float">
            <text:p>6324005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$G$1:.$G$222];[.I3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50051" calcext:value-type="float">
            <text:p>6325005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$G$1:.$G$222];[.I3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3250388" calcext:value-type="float">
            <text:p>632503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$G$1:.$G$222];[.I3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50052" calcext:value-type="float">
            <text:p>6325005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$G$1:.$G$222];[.I3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50389" calcext:value-type="float">
            <text:p>6325038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$G$1:.$G$222];[.I3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50390" calcext:value-type="float">
            <text:p>6325039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$G$1:.$G$222];[.I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054" calcext:value-type="float">
            <text:p>6325005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$G$1:.$G$222];[.I3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3250056" calcext:value-type="float">
            <text:p>6325005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$G$1:.$G$222];[.I3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3250058" calcext:value-type="float">
            <text:p>6325005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G$1:.$G$222];[.I3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30408" calcext:value-type="float">
            <text:p>6323040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$G$1:.$G$222];[.I3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50060" calcext:value-type="float">
            <text:p>632500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G$1:.$G$222];[.I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067" calcext:value-type="float">
            <text:p>6325006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G$1:.$G$222];[.I4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50068" calcext:value-type="float">
            <text:p>6325006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$G$1:.$G$222];[.I4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3250070" calcext:value-type="float">
            <text:p>632500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G$1:.$G$222];[.I4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072" calcext:value-type="float">
            <text:p>6325007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G$1:.$G$222];[.I4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3250074" calcext:value-type="float">
            <text:p>6325007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$G$1:.$G$222];[.I4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075" calcext:value-type="float">
            <text:p>6325007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$G$1:.$G$222];[.I4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50077" calcext:value-type="float">
            <text:p>6325007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$G$1:.$G$222];[.I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499" calcext:value-type="float">
            <text:p>6325049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$G$1:.$G$222];[.I4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3250080" calcext:value-type="float">
            <text:p>6325008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$G$1:.$G$222];[.I4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40090" calcext:value-type="float">
            <text:p>6324009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$G$1:.$G$222];[.I5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373" calcext:value-type="float">
            <text:p>6325037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$G$1:.$G$222];[.I5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40096" calcext:value-type="float">
            <text:p>6324009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$G$1:.$G$222];[.I5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084" calcext:value-type="float">
            <text:p>6325008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$G$1:.$G$222];[.I5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40097" calcext:value-type="float">
            <text:p>63240097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$G$1:.$G$222];[.I5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085" calcext:value-type="float">
            <text:p>6325008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$G$1:.$G$222];[.I5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3250088" calcext:value-type="float">
            <text:p>6325008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$G$1:.$G$222];[.I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30098" calcext:value-type="float">
            <text:p>6323009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$G$1:.$G$222];[.I5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091" calcext:value-type="float">
            <text:p>6325009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$G$1:.$G$222];[.I5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377" calcext:value-type="float">
            <text:p>6325037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$G$1:.$G$222];[.I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092" calcext:value-type="float">
            <text:p>6325009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$G$1:.$G$222];[.I6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40394" calcext:value-type="float">
            <text:p>6324039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$G$1:.$G$222];[.I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096" calcext:value-type="float">
            <text:p>6325009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$G$1:.$G$222];[.I6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50097" calcext:value-type="float">
            <text:p>6325009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$G$1:.$G$222];[.I6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20515" calcext:value-type="float">
            <text:p>6322051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$G$1:.$G$222];[.I6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100" calcext:value-type="float">
            <text:p>632501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$G$1:.$G$222];[.I6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101" calcext:value-type="float">
            <text:p>6325010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$G$1:.$G$222];[.I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40113" calcext:value-type="float">
            <text:p>632401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$G$1:.$G$222];[.I6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102" calcext:value-type="float">
            <text:p>6325010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$G$1:.$G$222];[.I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104" calcext:value-type="float">
            <text:p>6325010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$G$1:.$G$222];[.I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378" calcext:value-type="float">
            <text:p>6325037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$G$1:.$G$222];[.I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05" calcext:value-type="float">
            <text:p>6325010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$G$1:.$G$222];[.I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06" calcext:value-type="float">
            <text:p>6325010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$G$1:.$G$222];[.I7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50113" calcext:value-type="float">
            <text:p>632501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$G$1:.$G$222];[.I7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115" calcext:value-type="float">
            <text:p>632501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$G$1:.$G$222];[.I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116" calcext:value-type="float">
            <text:p>632501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$G$1:.$G$222];[.I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118" calcext:value-type="float">
            <text:p>632501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$G$1:.$G$222];[.I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483" calcext:value-type="float">
            <text:p>6325048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$G$1:.$G$222];[.I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120" calcext:value-type="float">
            <text:p>632501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$G$1:.$G$222];[.I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121" calcext:value-type="float">
            <text:p>632501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$G$1:.$G$222];[.I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22" calcext:value-type="float">
            <text:p>632501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$G$1:.$G$222];[.I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24" calcext:value-type="float">
            <text:p>632501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$G$1:.$G$222];[.I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40141" calcext:value-type="float">
            <text:p>6324014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$G$1:.$G$222];[.I8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128" calcext:value-type="float">
            <text:p>6325012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$G$1:.$G$222];[.I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29" calcext:value-type="float">
            <text:p>632501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$G$1:.$G$222];[.I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40149" calcext:value-type="float">
            <text:p>6324014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$G$1:.$G$222];[.I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366" calcext:value-type="float">
            <text:p>6325036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$G$1:.$G$222];[.I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38" calcext:value-type="float">
            <text:p>6325013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$G$1:.$G$222];[.I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142" calcext:value-type="float">
            <text:p>632501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$G$1:.$G$222];[.I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45" calcext:value-type="float">
            <text:p>6325014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$G$1:.$G$222];[.I8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148" calcext:value-type="float">
            <text:p>6325014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$G$1:.$G$222];[.I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0149" calcext:value-type="float">
            <text:p>6325014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$G$1:.$G$222];[.I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50" calcext:value-type="float">
            <text:p>6325015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$G$1:.$G$222];[.I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51" calcext:value-type="float">
            <text:p>6325015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$G$1:.$G$222];[.I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53" calcext:value-type="float">
            <text:p>6325015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$G$1:.$G$222];[.I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449" calcext:value-type="float">
            <text:p>6325044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$G$1:.$G$222];[.I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403" calcext:value-type="float">
            <text:p>6325040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$G$1:.$G$222];[.I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450" calcext:value-type="float">
            <text:p>6325045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$G$1:.$G$222];[.I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485" calcext:value-type="float">
            <text:p>6325048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$G$1:.$G$222];[.I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58" calcext:value-type="float">
            <text:p>6325015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$G$1:.$G$222];[.I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59" calcext:value-type="float">
            <text:p>6325015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$G$1:.$G$222];[.I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404" calcext:value-type="float">
            <text:p>632504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$G$1:.$G$222];[.I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67" calcext:value-type="float">
            <text:p>6325016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$G$1:.$G$222];[.I1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73" calcext:value-type="float">
            <text:p>6325017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$G$1:.$G$222];[.I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74" calcext:value-type="float">
            <text:p>6325017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$G$1:.$G$222];[.I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487" calcext:value-type="float">
            <text:p>6325048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$G$1:.$G$222];[.I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77" calcext:value-type="float">
            <text:p>6325017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$G$1:.$G$222];[.I1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511" calcext:value-type="float">
            <text:p>6325051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$G$1:.$G$222];[.I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79" calcext:value-type="float">
            <text:p>6325017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$G$1:.$G$222];[.I1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405" calcext:value-type="float">
            <text:p>6325040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$G$1:.$G$222];[.I10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50182" calcext:value-type="float">
            <text:p>6325018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$G$1:.$G$222];[.I1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407" calcext:value-type="float">
            <text:p>6325040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$G$1:.$G$222];[.I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85" calcext:value-type="float">
            <text:p>6325018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$G$1:.$G$222];[.I1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86" calcext:value-type="float">
            <text:p>6325018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$G$1:.$G$222];[.I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89" calcext:value-type="float">
            <text:p>632501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$G$1:.$G$222];[.I1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97" calcext:value-type="float">
            <text:p>63250197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$G$1:.$G$222];[.I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98" calcext:value-type="float">
            <text:p>6325019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$G$1:.$G$222];[.I1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199" calcext:value-type="float">
            <text:p>6325019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$G$1:.$G$222];[.I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201" calcext:value-type="float">
            <text:p>6325020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$G$1:.$G$222];[.I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202" calcext:value-type="float">
            <text:p>6325020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$G$1:.$G$222];[.I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412" calcext:value-type="float">
            <text:p>632504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$G$1:.$G$222];[.I1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379" calcext:value-type="float">
            <text:p>6325037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$G$1:.$G$222];[.I1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208" calcext:value-type="float">
            <text:p>6325020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$G$1:.$G$222];[.I1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40218" calcext:value-type="float">
            <text:p>6324021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$G$1:.$G$222];[.I1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413" calcext:value-type="float">
            <text:p>632504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$G$1:.$G$222];[.I1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211" calcext:value-type="float">
            <text:p>632502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$G$1:.$G$222];[.I1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50414" calcext:value-type="float">
            <text:p>632504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$G$1:.$G$222];[.I1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40220" calcext:value-type="float">
            <text:p>632402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SUM([.J1:.J126]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3250212" calcext:value-type="float">
            <text:p>6325021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3250415" calcext:value-type="float">
            <text:p>632504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63250213" calcext:value-type="float">
            <text:p>632502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50214" calcext:value-type="float">
            <text:p>632502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63240224" calcext:value-type="float">
            <text:p>6324022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3250215" calcext:value-type="float">
            <text:p>6325021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3250216" calcext:value-type="float">
            <text:p>632502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63250222" calcext:value-type="float">
            <text:p>6325022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63250223" calcext:value-type="float">
            <text:p>6325022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63250225" calcext:value-type="float">
            <text:p>632502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3250418" calcext:value-type="float">
            <text:p>632504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63250227" calcext:value-type="float">
            <text:p>6325022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63250229" calcext:value-type="float">
            <text:p>6325022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63250230" calcext:value-type="float">
            <text:p>632502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63250490" calcext:value-type="float">
            <text:p>632504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30238" calcext:value-type="float">
            <text:p>632302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50232" calcext:value-type="float">
            <text:p>632502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63250233" calcext:value-type="float">
            <text:p>6325023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3220246" calcext:value-type="float">
            <text:p>6322024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63240236" calcext:value-type="float">
            <text:p>6324023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3240237" calcext:value-type="float">
            <text:p>632402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50423" calcext:value-type="float">
            <text:p>632504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63250237" calcext:value-type="float">
            <text:p>6325023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63250239" calcext:value-type="float">
            <text:p>632502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3250240" calcext:value-type="float">
            <text:p>6325024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3250241" calcext:value-type="float">
            <text:p>632502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3250242" calcext:value-type="float">
            <text:p>632502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3250246" calcext:value-type="float">
            <text:p>6325024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3240250" calcext:value-type="float">
            <text:p>632402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50247" calcext:value-type="float">
            <text:p>6325024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63250248" calcext:value-type="float">
            <text:p>6325024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3250251" calcext:value-type="float">
            <text:p>632502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50253" calcext:value-type="float">
            <text:p>6325025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63250255" calcext:value-type="float">
            <text:p>6325025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63250256" calcext:value-type="float">
            <text:p>632502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3250257" calcext:value-type="float">
            <text:p>6325025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63250263" calcext:value-type="float">
            <text:p>632502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50264" calcext:value-type="float">
            <text:p>6325026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3250268" calcext:value-type="float">
            <text:p>632502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50269" calcext:value-type="float">
            <text:p>632502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3250270" calcext:value-type="float">
            <text:p>6325027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63250275" calcext:value-type="float">
            <text:p>632502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40287" calcext:value-type="float">
            <text:p>6324028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63250279" calcext:value-type="float">
            <text:p>63250279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3240288" calcext:value-type="float">
            <text:p>6324028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63250369" calcext:value-type="float">
            <text:p>63250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3250282" calcext:value-type="float">
            <text:p>632502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50285" calcext:value-type="float">
            <text:p>6325028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63250286" calcext:value-type="float">
            <text:p>6325028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63250427" calcext:value-type="float">
            <text:p>6325042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63240292" calcext:value-type="float">
            <text:p>6324029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3250295" calcext:value-type="float">
            <text:p>632502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50296" calcext:value-type="float">
            <text:p>6325029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63250432" calcext:value-type="float">
            <text:p>6325043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63250299" calcext:value-type="float">
            <text:p>6325029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63250300" calcext:value-type="float">
            <text:p>6325030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3250434" calcext:value-type="float">
            <text:p>6325043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63250302" calcext:value-type="float">
            <text:p>6325030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63250304" calcext:value-type="float">
            <text:p>632503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3250492" calcext:value-type="float">
            <text:p>632504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50310" calcext:value-type="float">
            <text:p>632503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63250312" calcext:value-type="float">
            <text:p>632503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50316" calcext:value-type="float">
            <text:p>632503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63250320" calcext:value-type="float">
            <text:p>632503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63250321" calcext:value-type="float">
            <text:p>632503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3250322" calcext:value-type="float">
            <text:p>632503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63250325" calcext:value-type="float">
            <text:p>6325032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3250324" calcext:value-type="float">
            <text:p>632503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3250327" calcext:value-type="float">
            <text:p>6325032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63250328" calcext:value-type="float">
            <text:p>632503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63250330" calcext:value-type="float">
            <text:p>6325033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63250331" calcext:value-type="float">
            <text:p>632503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50332" calcext:value-type="float">
            <text:p>6325033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3250333" calcext:value-type="float">
            <text:p>6325033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240493" calcext:value-type="float">
            <text:p>632404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40340" calcext:value-type="float">
            <text:p>6324034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3250334" calcext:value-type="float">
            <text:p>6325033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63250335" calcext:value-type="float">
            <text:p>6325033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63250336" calcext:value-type="float">
            <text:p>6325033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63250342" calcext:value-type="float">
            <text:p>632503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50343" calcext:value-type="float">
            <text:p>6325034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3250348" calcext:value-type="float">
            <text:p>632503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3240350" calcext:value-type="float">
            <text:p>632403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40351" calcext:value-type="float">
            <text:p>6324035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63250352" calcext:value-type="float">
            <text:p>6325035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63250353" calcext:value-type="float">
            <text:p>6325035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63250356" calcext:value-type="float">
            <text:p>6325035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63250357" calcext:value-type="float">
            <text:p>6325035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63250358" calcext:value-type="float">
            <text:p>6325035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63250361" calcext:value-type="float">
            <text:p>632503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50441" calcext:value-type="float">
            <text:p>6325044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3250496" calcext:value-type="float">
            <text:p>632504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40372" calcext:value-type="float">
            <text:p>6324037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63250363" calcext:value-type="float">
            <text:p>6325036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3250364" calcext:value-type="float">
            <text:p>6325036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1:.G222])" office:value-type="float" office:value="35.027027027027" calcext:value-type="float">
            <text:p>35.02702702702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00:52:53.062589922</meta:creation-date>
    <dc:date>2025-12-17T01:06:03.944559149</dc:date>
    <meta:editing-duration>PT2M52S</meta:editing-duration>
    <meta:editing-cycles>1</meta:editing-cycles>
    <meta:document-statistic meta:table-count="1" meta:cell-count="1808" meta:object-count="2"/>
    <meta:generator>LibreOffice/25.8.3.2$Linux_X86_64 LibreOffice_project/5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01cm" svg:y="4.161cm" style:legend-expansion="high" chart:style-name="ch2"/>
        <chart:plot-area chart:style-name="ch3" svg:x="0.32cm" svg:y="0.18cm" svg:width="13.161cm" svg:height="8.64cm">
          <chart:coordinate-region svg:x="0.964cm" svg:y="0.419cm" svg:width="12.517cm" svg:height="7.3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:Sheet1.J126" chart:class="chart:bar">
            <chart:data-point chart:repeated="1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">
                <text:p>39</text:p>
                <draw:g>
                  <svg:desc>Sheet1.J1:Sheet1.J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01cm" svg:y="4.161cm" style:legend-expansion="high" chart:style-name="ch2"/>
        <chart:plot-area chart:style-name="ch3" svg:x="0.32cm" svg:y="0.18cm" svg:width="13.161cm" svg:height="8.64cm">
          <chart:coordinate-region svg:x="0.964cm" svg:y="0.419cm" svg:width="12.517cm" svg:height="7.3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126" chart:class="chart:bar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2:Sheet1.J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