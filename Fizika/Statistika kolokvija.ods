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264in" svg:height="4.2335in" svg:x="24.0299in" svg:y="5.5433in">
            <draw:object draw:notify-on-update-of-ranges="Sheet1.J1:Sheet1.J1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1. kolokvij (brez 0)" draw:style-name="gr1" draw:text-style-name="P1" svg:width="7.5386in" svg:height="4.2402in" svg:x="23.9929in" svg:y="0.0075in">
            <draw:object draw:notify-on-update-of-ranges="Sheet1.J2:Sheet1.J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7.726in" svg:height="4.3457in" svg:x="39.1496in" svg:y="0.0311in">
            <draw:object draw:notify-on-update-of-ranges="Sheet1.Z2:Sheet1.Z2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number-columns-repeated="17"/>
        <table:table-row table:style-name="ro1">
          <table:table-cell office:value-type="float" office:value="63250382" calcext:value-type="float">
            <text:p>632503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G$1:.$G$222];[.I1])" office:value-type="float" office:value="39" calcext:value-type="float">
            <text:p>39</text:p>
          </table:table-cell>
          <table:table-cell/>
          <table:table-cell office:value-type="float" office:value="63250382" calcext:value-type="float">
            <text:p>6325038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]=0;[.R1]&gt;0); &quot;:o&quot;; &quot;&quot;)">
            <text:p/>
          </table:table-cell>
          <table:table-cell office:value-type="float" office:value="0" calcext:value-type="float">
            <text:p>0</text:p>
          </table:table-cell>
          <table:table-cell table:formula="of:=COUNTIF([.$R$1:.$R$222];[.T1])" office:value-type="float" office:value="87" calcext:value-type="float">
            <text:p>87</text:p>
          </table:table-cell>
          <table:table-cell/>
          <table:table-cell table:formula="of:=SUM([.G1];[.R1])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W$1:.W$222];[.Y1])" office:value-type="float" office:value="39" calcext:value-type="float">
            <text:p>39</text:p>
          </table:table-cell>
          <table:table-cell table:number-columns-repeated="2"/>
          <table:table-cell table:style-name="Default" table:number-columns-repeated="7"/>
          <table:table-cell table:style-name="Default">
            <draw:frame draw:z-index="2" draw:style-name="gr1" draw:text-style-name="P1" svg:width="7.6354in" svg:height="4.2949in" svg:x="0.322in" svg:y="0.0213in">
              <draw:object draw:notify-on-update-of-ranges="Sheet1.U2:Sheet1.U1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  <table:table-row table:style-name="ro1">
          <table:table-cell office:value-type="float" office:value="63250006" calcext:value-type="float">
            <text:p>6325000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G$1:.$G$222];[.I2])" office:value-type="float" office:value="0" calcext:value-type="float">
            <text:p>0</text:p>
          </table:table-cell>
          <table:table-cell/>
          <table:table-cell office:value-type="float" office:value="63250006" calcext:value-type="float">
            <text:p>6325000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AND([.G2]=0;[.R2]&gt;0); &quot;:o&quot;; &quot;&quot;)">
            <text:p/>
          </table:table-cell>
          <table:table-cell office:value-type="float" office:value="1" calcext:value-type="float">
            <text:p>1</text:p>
          </table:table-cell>
          <table:table-cell table:formula="of:=COUNTIF([.$R$1:.$R$222];[.T2])" office:value-type="float" office:value="0" calcext:value-type="float">
            <text:p>0</text:p>
          </table:table-cell>
          <table:table-cell/>
          <table:table-cell table:formula="of:=SUM([.G2];[.R2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W$1:.W$222];[.Y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87" calcext:value-type="float">
            <text:p>6324038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G$1:.$G$222];[.I3])" office:value-type="float" office:value="0" calcext:value-type="float">
            <text:p>0</text:p>
          </table:table-cell>
          <table:table-cell/>
          <table:table-cell office:value-type="float" office:value="63240387" calcext:value-type="float">
            <text:p>6324038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IF(AND([.G3]=0;[.R3]&gt;0); &quot;:o&quot;; &quot;&quot;)">
            <text:p/>
          </table:table-cell>
          <table:table-cell office:value-type="float" office:value="2" calcext:value-type="float">
            <text:p>2</text:p>
          </table:table-cell>
          <table:table-cell table:formula="of:=COUNTIF([.$R$1:.$R$222];[.T3])" office:value-type="float" office:value="0" calcext:value-type="float">
            <text:p>0</text:p>
          </table:table-cell>
          <table:table-cell/>
          <table:table-cell table:formula="of:=SUM([.G3];[.R3])" office:value-type="float" office:value="94" calcext:value-type="float">
            <text:p>94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W$1:.W$222];[.Y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08" calcext:value-type="float">
            <text:p>632500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G$1:.$G$222];[.I4])" office:value-type="float" office:value="1" calcext:value-type="float">
            <text:p>1</text:p>
          </table:table-cell>
          <table:table-cell/>
          <table:table-cell office:value-type="float" office:value="63250008" calcext:value-type="float">
            <text:p>6325000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table:formula="of:=IF(AND([.G4]=0;[.R4]&gt;0); &quot;:o&quot;; &quot;&quot;)">
            <text:p/>
          </table:table-cell>
          <table:table-cell office:value-type="float" office:value="3" calcext:value-type="float">
            <text:p>3</text:p>
          </table:table-cell>
          <table:table-cell table:formula="of:=COUNTIF([.$R$1:.$R$222];[.T4])" office:value-type="float" office:value="0" calcext:value-type="float">
            <text:p>0</text:p>
          </table:table-cell>
          <table:table-cell/>
          <table:table-cell table:formula="of:=SUM([.G4];[.R4])" office:value-type="float" office:value="221" calcext:value-type="float">
            <text:p>22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W$1:.W$222];[.Y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09" calcext:value-type="float">
            <text:p>6325000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G$1:.$G$222];[.I5])" office:value-type="float" office:value="0" calcext:value-type="float">
            <text:p>0</text:p>
          </table:table-cell>
          <table:table-cell/>
          <table:table-cell office:value-type="float" office:value="63250009" calcext:value-type="float">
            <text:p>6325000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IF(AND([.G5]=0;[.R5]&gt;0); &quot;:o&quot;; &quot;&quot;)">
            <text:p/>
          </table:table-cell>
          <table:table-cell office:value-type="float" office:value="4" calcext:value-type="float">
            <text:p>4</text:p>
          </table:table-cell>
          <table:table-cell table:formula="of:=COUNTIF([.$R$1:.$R$222];[.T5])" office:value-type="float" office:value="0" calcext:value-type="float">
            <text:p>0</text:p>
          </table:table-cell>
          <table:table-cell/>
          <table:table-cell table:formula="of:=SUM([.G5];[.R5])"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W$1:.W$222];[.Y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14" calcext:value-type="float">
            <text:p>632500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G$1:.$G$222];[.I6])" office:value-type="float" office:value="1" calcext:value-type="float">
            <text:p>1</text:p>
          </table:table-cell>
          <table:table-cell/>
          <table:table-cell office:value-type="float" office:value="63250014" calcext:value-type="float">
            <text:p>632500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IF(AND([.G6]=0;[.R6]&gt;0); &quot;:o&quot;; &quot;&quot;)">
            <text:p/>
          </table:table-cell>
          <table:table-cell office:value-type="float" office:value="5" calcext:value-type="float">
            <text:p>5</text:p>
          </table:table-cell>
          <table:table-cell table:formula="of:=COUNTIF([.$R$1:.$R$222];[.T6])" office:value-type="float" office:value="0" calcext:value-type="float">
            <text:p>0</text:p>
          </table:table-cell>
          <table:table-cell/>
          <table:table-cell table:formula="of:=SUM([.G6];[.R6])" office:value-type="float" office:value="108" calcext:value-type="float">
            <text:p>108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W$1:.W$222];[.Y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16" calcext:value-type="float">
            <text:p>6325001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G$1:.$G$222];[.I7])" office:value-type="float" office:value="2" calcext:value-type="float">
            <text:p>2</text:p>
          </table:table-cell>
          <table:table-cell/>
          <table:table-cell office:value-type="float" office:value="63250016" calcext:value-type="float">
            <text:p>63250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]=0;[.R7]&gt;0); &quot;:o&quot;; &quot;&quot;)">
            <text:p/>
          </table:table-cell>
          <table:table-cell office:value-type="float" office:value="6" calcext:value-type="float">
            <text:p>6</text:p>
          </table:table-cell>
          <table:table-cell table:formula="of:=COUNTIF([.$R$1:.$R$222];[.T7])" office:value-type="float" office:value="2" calcext:value-type="float">
            <text:p>2</text:p>
          </table:table-cell>
          <table:table-cell/>
          <table:table-cell table:formula="of:=SUM([.G7];[.R7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W$1:.W$222];[.Y7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17" calcext:value-type="float">
            <text:p>632500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G$1:.$G$222];[.I8])" office:value-type="float" office:value="0" calcext:value-type="float">
            <text:p>0</text:p>
          </table:table-cell>
          <table:table-cell/>
          <table:table-cell office:value-type="float" office:value="63250017" calcext:value-type="float">
            <text:p>632500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AND([.G8]=0;[.R8]&gt;0); &quot;:o&quot;; &quot;&quot;)">
            <text:p/>
          </table:table-cell>
          <table:table-cell office:value-type="float" office:value="7" calcext:value-type="float">
            <text:p>7</text:p>
          </table:table-cell>
          <table:table-cell table:formula="of:=COUNTIF([.$R$1:.$R$222];[.T8])" office:value-type="float" office:value="0" calcext:value-type="float">
            <text:p>0</text:p>
          </table:table-cell>
          <table:table-cell/>
          <table:table-cell table:formula="of:=SUM([.G8];[.R8])" office:value-type="float" office:value="90" calcext:value-type="float">
            <text:p>9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W$1:.W$222];[.Y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18" calcext:value-type="float">
            <text:p>632500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G$1:.$G$222];[.I9])" office:value-type="float" office:value="1" calcext:value-type="float">
            <text:p>1</text:p>
          </table:table-cell>
          <table:table-cell/>
          <table:table-cell office:value-type="float" office:value="63250018" calcext:value-type="float">
            <text:p>632500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AND([.G9]=0;[.R9]&gt;0); &quot;:o&quot;; &quot;&quot;)">
            <text:p/>
          </table:table-cell>
          <table:table-cell office:value-type="float" office:value="8" calcext:value-type="float">
            <text:p>8</text:p>
          </table:table-cell>
          <table:table-cell table:formula="of:=COUNTIF([.$R$1:.$R$222];[.T9])" office:value-type="float" office:value="1" calcext:value-type="float">
            <text:p>1</text:p>
          </table:table-cell>
          <table:table-cell/>
          <table:table-cell table:formula="of:=SUM([.G9];[.R9])" office:value-type="float" office:value="110" calcext:value-type="float">
            <text:p>11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W$1:.W$222];[.Y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22" calcext:value-type="float">
            <text:p>632500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G$1:.$G$222];[.I10])" office:value-type="float" office:value="0" calcext:value-type="float">
            <text:p>0</text:p>
          </table:table-cell>
          <table:table-cell/>
          <table:table-cell office:value-type="float" office:value="63250022" calcext:value-type="float">
            <text:p>632500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AND([.G10]=0;[.R10]&gt;0); &quot;:o&quot;; &quot;&quot;)">
            <text:p/>
          </table:table-cell>
          <table:table-cell office:value-type="float" office:value="9" calcext:value-type="float">
            <text:p>9</text:p>
          </table:table-cell>
          <table:table-cell table:formula="of:=COUNTIF([.$R$1:.$R$222];[.T10])" office:value-type="float" office:value="1" calcext:value-type="float">
            <text:p>1</text:p>
          </table:table-cell>
          <table:table-cell/>
          <table:table-cell table:formula="of:=SUM([.G10];[.R10])"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W$1:.W$222];[.Y1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25" calcext:value-type="float">
            <text:p>632500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G$1:.$G$222];[.I11])" office:value-type="float" office:value="0" calcext:value-type="float">
            <text:p>0</text:p>
          </table:table-cell>
          <table:table-cell/>
          <table:table-cell office:value-type="float" office:value="63250025" calcext:value-type="float">
            <text:p>632500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IF(AND([.G11]=0;[.R11]&gt;0); &quot;:o&quot;; &quot;&quot;)">
            <text:p/>
          </table:table-cell>
          <table:table-cell office:value-type="float" office:value="10" calcext:value-type="float">
            <text:p>10</text:p>
          </table:table-cell>
          <table:table-cell table:formula="of:=COUNTIF([.$R$1:.$R$222];[.T11])" office:value-type="float" office:value="1" calcext:value-type="float">
            <text:p>1</text:p>
          </table:table-cell>
          <table:table-cell/>
          <table:table-cell table:formula="of:=SUM([.G11];[.R11])" office:value-type="float" office:value="97" calcext:value-type="float">
            <text:p>9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W$1:.W$222];[.Y1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29" calcext:value-type="float">
            <text:p>632500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G$1:.$G$222];[.I12])" office:value-type="float" office:value="3" calcext:value-type="float">
            <text:p>3</text:p>
          </table:table-cell>
          <table:table-cell/>
          <table:table-cell office:value-type="float" office:value="63250029" calcext:value-type="float">
            <text:p>6325002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2]=0;[.R12]&gt;0); &quot;:o&quot;; &quot;&quot;)">
            <text:p/>
          </table:table-cell>
          <table:table-cell office:value-type="float" office:value="11" calcext:value-type="float">
            <text:p>11</text:p>
          </table:table-cell>
          <table:table-cell table:formula="of:=COUNTIF([.$R$1:.$R$222];[.T12])" office:value-type="float" office:value="1" calcext:value-type="float">
            <text:p>1</text:p>
          </table:table-cell>
          <table:table-cell/>
          <table:table-cell table:formula="of:=SUM([.G12];[.R12]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W$1:.W$222];[.Y12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30032" calcext:value-type="float">
            <text:p>6323003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G$1:.$G$222];[.I13])" office:value-type="float" office:value="1" calcext:value-type="float">
            <text:p>1</text:p>
          </table:table-cell>
          <table:table-cell/>
          <table:table-cell office:value-type="float" office:value="63230032" calcext:value-type="float">
            <text:p>6323003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]=0;[.R13]&gt;0); &quot;:o&quot;; &quot;&quot;)">
            <text:p/>
          </table:table-cell>
          <table:table-cell office:value-type="float" office:value="12" calcext:value-type="float">
            <text:p>12</text:p>
          </table:table-cell>
          <table:table-cell table:formula="of:=COUNTIF([.$R$1:.$R$222];[.T13])" office:value-type="float" office:value="0" calcext:value-type="float">
            <text:p>0</text:p>
          </table:table-cell>
          <table:table-cell/>
          <table:table-cell table:formula="of:=SUM([.G13];[.R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W$1:.W$222];[.Y1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34" calcext:value-type="float">
            <text:p>632500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G$1:.$G$222];[.I14])" office:value-type="float" office:value="0" calcext:value-type="float">
            <text:p>0</text:p>
          </table:table-cell>
          <table:table-cell/>
          <table:table-cell office:value-type="float" office:value="63250034" calcext:value-type="float">
            <text:p>632500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IF(AND([.G14]=0;[.R14]&gt;0); &quot;:o&quot;; &quot;&quot;)">
            <text:p/>
          </table:table-cell>
          <table:table-cell office:value-type="float" office:value="13" calcext:value-type="float">
            <text:p>13</text:p>
          </table:table-cell>
          <table:table-cell table:formula="of:=COUNTIF([.$R$1:.$R$222];[.T14])" office:value-type="float" office:value="3" calcext:value-type="float">
            <text:p>3</text:p>
          </table:table-cell>
          <table:table-cell/>
          <table:table-cell table:formula="of:=SUM([.G14];[.R14])"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W$1:.W$222];[.Y1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32" calcext:value-type="float">
            <text:p>632400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G$1:.$G$222];[.I15])" office:value-type="float" office:value="1" calcext:value-type="float">
            <text:p>1</text:p>
          </table:table-cell>
          <table:table-cell/>
          <table:table-cell office:value-type="float" office:value="63240032" calcext:value-type="float">
            <text:p>632400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AND([.G15]=0;[.R15]&gt;0); &quot;:o&quot;; &quot;&quot;)">
            <text:p/>
          </table:table-cell>
          <table:table-cell office:value-type="float" office:value="14" calcext:value-type="float">
            <text:p>14</text:p>
          </table:table-cell>
          <table:table-cell table:formula="of:=COUNTIF([.$R$1:.$R$222];[.T15])" office:value-type="float" office:value="2" calcext:value-type="float">
            <text:p>2</text:p>
          </table:table-cell>
          <table:table-cell/>
          <table:table-cell table:formula="of:=SUM([.G15];[.R15])"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W$1:.W$222];[.Y1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80" calcext:value-type="float">
            <text:p>632403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G$1:.$G$222];[.I16])" office:value-type="float" office:value="0" calcext:value-type="float">
            <text:p>0</text:p>
          </table:table-cell>
          <table:table-cell/>
          <table:table-cell office:value-type="float" office:value="63240380" calcext:value-type="float">
            <text:p>632403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AND([.G16]=0;[.R16]&gt;0); &quot;:o&quot;; &quot;&quot;)">
            <text:p/>
          </table:table-cell>
          <table:table-cell office:value-type="float" office:value="15" calcext:value-type="float">
            <text:p>15</text:p>
          </table:table-cell>
          <table:table-cell table:formula="of:=COUNTIF([.$R$1:.$R$222];[.T16])" office:value-type="float" office:value="1" calcext:value-type="float">
            <text:p>1</text:p>
          </table:table-cell>
          <table:table-cell/>
          <table:table-cell table:formula="of:=SUM([.G16];[.R16])" office:value-type="float" office:value="83" calcext:value-type="float">
            <text:p>8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W$1:.W$222];[.Y1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30512" calcext:value-type="float">
            <text:p>6323051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G$1:.$G$222];[.I17])" office:value-type="float" office:value="0" calcext:value-type="float">
            <text:p>0</text:p>
          </table:table-cell>
          <table:table-cell/>
          <table:table-cell office:value-type="float" office:value="63230512" calcext:value-type="float">
            <text:p>632305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7]=0;[.R17]&gt;0); &quot;:o&quot;; &quot;&quot;)">
            <text:p/>
          </table:table-cell>
          <table:table-cell office:value-type="float" office:value="16" calcext:value-type="float">
            <text:p>16</text:p>
          </table:table-cell>
          <table:table-cell table:formula="of:=COUNTIF([.$R$1:.$R$222];[.T17])" office:value-type="float" office:value="0" calcext:value-type="float">
            <text:p>0</text:p>
          </table:table-cell>
          <table:table-cell/>
          <table:table-cell table:formula="of:=SUM([.G17];[.R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W$1:.W$222];[.Y1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41" calcext:value-type="float">
            <text:p>632400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G$1:.$G$222];[.I18])" office:value-type="float" office:value="2" calcext:value-type="float">
            <text:p>2</text:p>
          </table:table-cell>
          <table:table-cell/>
          <table:table-cell office:value-type="float" office:value="63240041" calcext:value-type="float">
            <text:p>632400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AND([.G18]=0;[.R18]&gt;0); &quot;:o&quot;; &quot;&quot;)">
            <text:p/>
          </table:table-cell>
          <table:table-cell office:value-type="float" office:value="17" calcext:value-type="float">
            <text:p>17</text:p>
          </table:table-cell>
          <table:table-cell table:formula="of:=COUNTIF([.$R$1:.$R$222];[.T18])" office:value-type="float" office:value="0" calcext:value-type="float">
            <text:p>0</text:p>
          </table:table-cell>
          <table:table-cell/>
          <table:table-cell table:formula="of:=SUM([.G18];[.R18])"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W$1:.W$222];[.Y18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84" calcext:value-type="float">
            <text:p>632503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G$1:.$G$222];[.I19])" office:value-type="float" office:value="4" calcext:value-type="float">
            <text:p>4</text:p>
          </table:table-cell>
          <table:table-cell/>
          <table:table-cell office:value-type="float" office:value="63250384" calcext:value-type="float">
            <text:p>6325038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AND([.G19]=0;[.R19]&gt;0); &quot;:o&quot;; &quot;&quot;)">
            <text:p/>
          </table:table-cell>
          <table:table-cell office:value-type="float" office:value="18" calcext:value-type="float">
            <text:p>18</text:p>
          </table:table-cell>
          <table:table-cell table:formula="of:=COUNTIF([.$R$1:.$R$222];[.T19])" office:value-type="float" office:value="0" calcext:value-type="float">
            <text:p>0</text:p>
          </table:table-cell>
          <table:table-cell/>
          <table:table-cell table:formula="of:=SUM([.G19];[.R19])" office:value-type="float" office:value="78" calcext:value-type="float">
            <text:p>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W$1:.W$222];[.Y19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85" calcext:value-type="float">
            <text:p>6325038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G$1:.$G$222];[.I20])" office:value-type="float" office:value="2" calcext:value-type="float">
            <text:p>2</text:p>
          </table:table-cell>
          <table:table-cell/>
          <table:table-cell office:value-type="float" office:value="63250385" calcext:value-type="float">
            <text:p>6325038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AND([.G20]=0;[.R20]&gt;0); &quot;:o&quot;; &quot;&quot;)">
            <text:p/>
          </table:table-cell>
          <table:table-cell office:value-type="float" office:value="19" calcext:value-type="float">
            <text:p>19</text:p>
          </table:table-cell>
          <table:table-cell table:formula="of:=COUNTIF([.$R$1:.$R$222];[.T20])" office:value-type="float" office:value="0" calcext:value-type="float">
            <text:p>0</text:p>
          </table:table-cell>
          <table:table-cell/>
          <table:table-cell table:formula="of:=SUM([.G20];[.R20])" office:value-type="float" office:value="76" calcext:value-type="float">
            <text:p>7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W$1:.W$222];[.Y2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45" calcext:value-type="float">
            <text:p>632400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G$1:.$G$222];[.I21])" office:value-type="float" office:value="5" calcext:value-type="float">
            <text:p>5</text:p>
          </table:table-cell>
          <table:table-cell/>
          <table:table-cell office:value-type="float" office:value="63240045" calcext:value-type="float">
            <text:p>6324004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AND([.G21]=0;[.R21]&gt;0); &quot;:o&quot;; &quot;&quot;)">
            <text:p/>
          </table:table-cell>
          <table:table-cell office:value-type="float" office:value="20" calcext:value-type="float">
            <text:p>20</text:p>
          </table:table-cell>
          <table:table-cell table:formula="of:=COUNTIF([.$R$1:.$R$222];[.T21])" office:value-type="float" office:value="2" calcext:value-type="float">
            <text:p>2</text:p>
          </table:table-cell>
          <table:table-cell/>
          <table:table-cell table:formula="of:=SUM([.G21];[.R21])" office:value-type="float" office:value="113" calcext:value-type="float">
            <text:p>1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W$1:.W$222];[.Y21])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41" calcext:value-type="float">
            <text:p>6325004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G$1:.$G$222];[.I22])" office:value-type="float" office:value="0" calcext:value-type="float">
            <text:p>0</text:p>
          </table:table-cell>
          <table:table-cell/>
          <table:table-cell office:value-type="float" office:value="63250041" calcext:value-type="float">
            <text:p>6325004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IF(AND([.G22]=0;[.R22]&gt;0); &quot;:o&quot;; &quot;&quot;)">
            <text:p/>
          </table:table-cell>
          <table:table-cell office:value-type="float" office:value="21" calcext:value-type="float">
            <text:p>21</text:p>
          </table:table-cell>
          <table:table-cell table:formula="of:=COUNTIF([.$R$1:.$R$222];[.T22])" office:value-type="float" office:value="2" calcext:value-type="float">
            <text:p>2</text:p>
          </table:table-cell>
          <table:table-cell/>
          <table:table-cell table:formula="of:=SUM([.G22];[.R22])" office:value-type="float" office:value="136" calcext:value-type="float">
            <text:p>13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W$1:.W$222];[.Y2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43" calcext:value-type="float">
            <text:p>6325004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G$1:.$G$222];[.I23])" office:value-type="float" office:value="4" calcext:value-type="float">
            <text:p>4</text:p>
          </table:table-cell>
          <table:table-cell/>
          <table:table-cell office:value-type="float" office:value="63250043" calcext:value-type="float">
            <text:p>632500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AND([.G23]=0;[.R23]&gt;0); &quot;:o&quot;; &quot;&quot;)">
            <text:p/>
          </table:table-cell>
          <table:table-cell office:value-type="float" office:value="22" calcext:value-type="float">
            <text:p>22</text:p>
          </table:table-cell>
          <table:table-cell table:formula="of:=COUNTIF([.$R$1:.$R$222];[.T23])" office:value-type="float" office:value="0" calcext:value-type="float">
            <text:p>0</text:p>
          </table:table-cell>
          <table:table-cell/>
          <table:table-cell table:formula="of:=SUM([.G23];[.R23])" office:value-type="float" office:value="72" calcext:value-type="float">
            <text:p>7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W$1:.W$222];[.Y23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78" calcext:value-type="float">
            <text:p>632504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G$1:.$G$222];[.I24])" office:value-type="float" office:value="5" calcext:value-type="float">
            <text:p>5</text:p>
          </table:table-cell>
          <table:table-cell/>
          <table:table-cell office:value-type="float" office:value="63250478" calcext:value-type="float">
            <text:p>632504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4]=0;[.R24]&gt;0); &quot;:o&quot;; &quot;&quot;)">
            <text:p/>
          </table:table-cell>
          <table:table-cell office:value-type="float" office:value="23" calcext:value-type="float">
            <text:p>23</text:p>
          </table:table-cell>
          <table:table-cell table:formula="of:=COUNTIF([.$R$1:.$R$222];[.T24])" office:value-type="float" office:value="2" calcext:value-type="float">
            <text:p>2</text:p>
          </table:table-cell>
          <table:table-cell/>
          <table:table-cell table:formula="of:=SUM([.G24];[.R24]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W$1:.W$222];[.Y24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79" calcext:value-type="float">
            <text:p>632504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G$1:.$G$222];[.I25])" office:value-type="float" office:value="4" calcext:value-type="float">
            <text:p>4</text:p>
          </table:table-cell>
          <table:table-cell/>
          <table:table-cell office:value-type="float" office:value="63250479" calcext:value-type="float">
            <text:p>632504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AND([.G25]=0;[.R25]&gt;0); &quot;:o&quot;; &quot;&quot;)">
            <text:p/>
          </table:table-cell>
          <table:table-cell office:value-type="float" office:value="24" calcext:value-type="float">
            <text:p>24</text:p>
          </table:table-cell>
          <table:table-cell table:formula="of:=COUNTIF([.$R$1:.$R$222];[.T25])" office:value-type="float" office:value="2" calcext:value-type="float">
            <text:p>2</text:p>
          </table:table-cell>
          <table:table-cell/>
          <table:table-cell table:formula="of:=SUM([.G25];[.R25])" office:value-type="float" office:value="35" calcext:value-type="float">
            <text:p>3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W$1:.W$222];[.Y25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45" calcext:value-type="float">
            <text:p>632500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G$1:.$G$222];[.I26])" office:value-type="float" office:value="3" calcext:value-type="float">
            <text:p>3</text:p>
          </table:table-cell>
          <table:table-cell/>
          <table:table-cell office:value-type="float" office:value="63250045" calcext:value-type="float">
            <text:p>632500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6]=0;[.R26]&gt;0); &quot;:o&quot;; &quot;&quot;)">
            <text:p/>
          </table:table-cell>
          <table:table-cell office:value-type="float" office:value="25" calcext:value-type="float">
            <text:p>25</text:p>
          </table:table-cell>
          <table:table-cell table:formula="of:=COUNTIF([.$R$1:.$R$222];[.T26])" office:value-type="float" office:value="1" calcext:value-type="float">
            <text:p>1</text:p>
          </table:table-cell>
          <table:table-cell/>
          <table:table-cell table:formula="of:=SUM([.G26];[.R26])"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W$1:.W$222];[.Y26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47" calcext:value-type="float">
            <text:p>632500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G$1:.$G$222];[.I27])" office:value-type="float" office:value="4" calcext:value-type="float">
            <text:p>4</text:p>
          </table:table-cell>
          <table:table-cell/>
          <table:table-cell office:value-type="float" office:value="63250047" calcext:value-type="float">
            <text:p>6325004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IF(AND([.G27]=0;[.R27]&gt;0); &quot;:o&quot;; &quot;&quot;)">
            <text:p/>
          </table:table-cell>
          <table:table-cell office:value-type="float" office:value="26" calcext:value-type="float">
            <text:p>26</text:p>
          </table:table-cell>
          <table:table-cell table:formula="of:=COUNTIF([.$R$1:.$R$222];[.T27])" office:value-type="float" office:value="0" calcext:value-type="float">
            <text:p>0</text:p>
          </table:table-cell>
          <table:table-cell/>
          <table:table-cell table:formula="of:=SUM([.G27];[.R27])"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W$1:.W$222];[.Y2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48" calcext:value-type="float">
            <text:p>632500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G$1:.$G$222];[.I28])" office:value-type="float" office:value="2" calcext:value-type="float">
            <text:p>2</text:p>
          </table:table-cell>
          <table:table-cell/>
          <table:table-cell office:value-type="float" office:value="63250048" calcext:value-type="float">
            <text:p>6325004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IF(AND([.G28]=0;[.R28]&gt;0); &quot;:o&quot;; &quot;&quot;)">
            <text:p/>
          </table:table-cell>
          <table:table-cell office:value-type="float" office:value="27" calcext:value-type="float">
            <text:p>27</text:p>
          </table:table-cell>
          <table:table-cell table:formula="of:=COUNTIF([.$R$1:.$R$222];[.T28])" office:value-type="float" office:value="2" calcext:value-type="float">
            <text:p>2</text:p>
          </table:table-cell>
          <table:table-cell/>
          <table:table-cell table:formula="of:=SUM([.G28];[.R28])" office:value-type="float" office:value="124" calcext:value-type="float">
            <text:p>12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W$1:.W$222];[.Y28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style-name="Default">
            <draw:frame draw:z-index="3" draw:style-name="gr1" draw:text-style-name="P1" svg:width="7.6433in" svg:height="4.2992in" svg:x="0.3311in" svg:y="0.1122in">
              <draw:object draw:notify-on-update-of-ranges="Sheet1.U1:Sheet1.U1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8"/>
          <table:table-cell table:style-name="Default">
            <draw:frame draw:z-index="5" draw:style-name="gr1" draw:text-style-name="P1" svg:width="7.7394in" svg:height="4.3531in" svg:x="0.0118in" svg:y="0.05in">
              <draw:object draw:notify-on-update-of-ranges="Sheet1.Z1:Sheet1.Z25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63250372" calcext:value-type="float">
            <text:p>6325037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G$1:.$G$222];[.I29])" office:value-type="float" office:value="2" calcext:value-type="float">
            <text:p>2</text:p>
          </table:table-cell>
          <table:table-cell/>
          <table:table-cell office:value-type="float" office:value="63250372" calcext:value-type="float">
            <text:p>6325037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9]=0;[.R29]&gt;0); &quot;:o&quot;; &quot;&quot;)">
            <text:p/>
          </table:table-cell>
          <table:table-cell office:value-type="float" office:value="28" calcext:value-type="float">
            <text:p>28</text:p>
          </table:table-cell>
          <table:table-cell table:formula="of:=COUNTIF([.$R$1:.$R$222];[.T29])" office:value-type="float" office:value="1" calcext:value-type="float">
            <text:p>1</text:p>
          </table:table-cell>
          <table:table-cell/>
          <table:table-cell table:formula="of:=SUM([.G29];[.R29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W$1:.W$222];[.Y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58" calcext:value-type="float">
            <text:p>6324005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G$1:.$G$222];[.I30])" office:value-type="float" office:value="4" calcext:value-type="float">
            <text:p>4</text:p>
          </table:table-cell>
          <table:table-cell/>
          <table:table-cell office:value-type="float" office:value="63240058" calcext:value-type="float">
            <text:p>6324005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30]=0;[.R30]&gt;0); &quot;:o&quot;; &quot;&quot;)">
            <text:p/>
          </table:table-cell>
          <table:table-cell office:value-type="float" office:value="29" calcext:value-type="float">
            <text:p>29</text:p>
          </table:table-cell>
          <table:table-cell table:formula="of:=COUNTIF([.$R$1:.$R$222];[.T30])" office:value-type="float" office:value="1" calcext:value-type="float">
            <text:p>1</text:p>
          </table:table-cell>
          <table:table-cell/>
          <table:table-cell table:formula="of:=SUM([.G30];[.R30])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W$1:.W$222];[.Y30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51" calcext:value-type="float">
            <text:p>632500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G$1:.$G$222];[.I31])" office:value-type="float" office:value="5" calcext:value-type="float">
            <text:p>5</text:p>
          </table:table-cell>
          <table:table-cell/>
          <table:table-cell office:value-type="float" office:value="63250051" calcext:value-type="float">
            <text:p>6325005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AND([.G31]=0;[.R31]&gt;0); &quot;:o&quot;; &quot;&quot;)">
            <text:p/>
          </table:table-cell>
          <table:table-cell office:value-type="float" office:value="30" calcext:value-type="float">
            <text:p>30</text:p>
          </table:table-cell>
          <table:table-cell table:formula="of:=COUNTIF([.$R$1:.$R$222];[.T31])" office:value-type="float" office:value="1" calcext:value-type="float">
            <text:p>1</text:p>
          </table:table-cell>
          <table:table-cell/>
          <table:table-cell table:formula="of:=SUM([.G31];[.R31])"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W$1:.W$222];[.Y31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88" calcext:value-type="float">
            <text:p>632503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G$1:.$G$222];[.I32])" office:value-type="float" office:value="4" calcext:value-type="float">
            <text:p>4</text:p>
          </table:table-cell>
          <table:table-cell/>
          <table:table-cell office:value-type="float" office:value="63250388" calcext:value-type="float">
            <text:p>632503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32]=0;[.R32]&gt;0); &quot;:o&quot;; &quot;&quot;)">
            <text:p/>
          </table:table-cell>
          <table:table-cell office:value-type="float" office:value="31" calcext:value-type="float">
            <text:p>31</text:p>
          </table:table-cell>
          <table:table-cell table:formula="of:=COUNTIF([.$R$1:.$R$222];[.T32])" office:value-type="float" office:value="2" calcext:value-type="float">
            <text:p>2</text:p>
          </table:table-cell>
          <table:table-cell/>
          <table:table-cell table:formula="of:=SUM([.G32];[.R32]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W$1:.W$222];[.Y32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52" calcext:value-type="float">
            <text:p>6325005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G$1:.$G$222];[.I33])" office:value-type="float" office:value="4" calcext:value-type="float">
            <text:p>4</text:p>
          </table:table-cell>
          <table:table-cell/>
          <table:table-cell office:value-type="float" office:value="63250052" calcext:value-type="float">
            <text:p>6325005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AND([.G33]=0;[.R33]&gt;0); &quot;:o&quot;; &quot;&quot;)">
            <text:p/>
          </table:table-cell>
          <table:table-cell office:value-type="float" office:value="32" calcext:value-type="float">
            <text:p>32</text:p>
          </table:table-cell>
          <table:table-cell table:formula="of:=COUNTIF([.$R$1:.$R$222];[.T33])" office:value-type="float" office:value="2" calcext:value-type="float">
            <text:p>2</text:p>
          </table:table-cell>
          <table:table-cell/>
          <table:table-cell table:formula="of:=SUM([.G33];[.R33])" office:value-type="float" office:value="91" calcext:value-type="float">
            <text:p>9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W$1:.W$222];[.Y3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89" calcext:value-type="float">
            <text:p>6325038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G$1:.$G$222];[.I34])" office:value-type="float" office:value="3" calcext:value-type="float">
            <text:p>3</text:p>
          </table:table-cell>
          <table:table-cell/>
          <table:table-cell office:value-type="float" office:value="63250389" calcext:value-type="float">
            <text:p>6325038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IF(AND([.G34]=0;[.R34]&gt;0); &quot;:o&quot;; &quot;&quot;)">
            <text:p/>
          </table:table-cell>
          <table:table-cell office:value-type="float" office:value="33" calcext:value-type="float">
            <text:p>33</text:p>
          </table:table-cell>
          <table:table-cell table:formula="of:=COUNTIF([.$R$1:.$R$222];[.T34])" office:value-type="float" office:value="2" calcext:value-type="float">
            <text:p>2</text:p>
          </table:table-cell>
          <table:table-cell/>
          <table:table-cell table:formula="of:=SUM([.G34];[.R34])" office:value-type="float" office:value="75" calcext:value-type="float">
            <text:p>7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W$1:.W$222];[.Y34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90" calcext:value-type="float">
            <text:p>6325039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G$1:.$G$222];[.I35])" office:value-type="float" office:value="1" calcext:value-type="float">
            <text:p>1</text:p>
          </table:table-cell>
          <table:table-cell/>
          <table:table-cell office:value-type="float" office:value="63250390" calcext:value-type="float">
            <text:p>6325039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formula="of:=IF(AND([.G35]=0;[.R35]&gt;0); &quot;:o&quot;; &quot;&quot;)">
            <text:p/>
          </table:table-cell>
          <table:table-cell office:value-type="float" office:value="34" calcext:value-type="float">
            <text:p>34</text:p>
          </table:table-cell>
          <table:table-cell table:formula="of:=COUNTIF([.$R$1:.$R$222];[.T35])" office:value-type="float" office:value="3" calcext:value-type="float">
            <text:p>3</text:p>
          </table:table-cell>
          <table:table-cell/>
          <table:table-cell table:formula="of:=SUM([.G35];[.R35])"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W$1:.W$222];[.Y3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54" calcext:value-type="float">
            <text:p>6325005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G$1:.$G$222];[.I36])" office:value-type="float" office:value="6" calcext:value-type="float">
            <text:p>6</text:p>
          </table:table-cell>
          <table:table-cell/>
          <table:table-cell office:value-type="float" office:value="63250054" calcext:value-type="float">
            <text:p>6325005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36]=0;[.R36]&gt;0); &quot;:o&quot;; &quot;&quot;)">
            <text:p/>
          </table:table-cell>
          <table:table-cell office:value-type="float" office:value="35" calcext:value-type="float">
            <text:p>35</text:p>
          </table:table-cell>
          <table:table-cell table:formula="of:=COUNTIF([.$R$1:.$R$222];[.T36])" office:value-type="float" office:value="0" calcext:value-type="float">
            <text:p>0</text:p>
          </table:table-cell>
          <table:table-cell/>
          <table:table-cell table:formula="of:=SUM([.G36];[.R36]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W$1:.W$222];[.Y36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56" calcext:value-type="float">
            <text:p>632500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G$1:.$G$222];[.I37])" office:value-type="float" office:value="6" calcext:value-type="float">
            <text:p>6</text:p>
          </table:table-cell>
          <table:table-cell/>
          <table:table-cell office:value-type="float" office:value="63250056" calcext:value-type="float">
            <text:p>632500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IF(AND([.G37]=0;[.R37]&gt;0); &quot;:o&quot;; &quot;&quot;)">
            <text:p/>
          </table:table-cell>
          <table:table-cell office:value-type="float" office:value="36" calcext:value-type="float">
            <text:p>36</text:p>
          </table:table-cell>
          <table:table-cell table:formula="of:=COUNTIF([.$R$1:.$R$222];[.T37])" office:value-type="float" office:value="0" calcext:value-type="float">
            <text:p>0</text:p>
          </table:table-cell>
          <table:table-cell/>
          <table:table-cell table:formula="of:=SUM([.G37];[.R37])" office:value-type="float" office:value="131" calcext:value-type="float">
            <text:p>13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W$1:.W$222];[.Y3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58" calcext:value-type="float">
            <text:p>6325005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G$1:.$G$222];[.I38])" office:value-type="float" office:value="2" calcext:value-type="float">
            <text:p>2</text:p>
          </table:table-cell>
          <table:table-cell/>
          <table:table-cell office:value-type="float" office:value="63250058" calcext:value-type="float">
            <text:p>632500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AND([.G38]=0;[.R38]&gt;0); &quot;:o&quot;; &quot;&quot;)">
            <text:p/>
          </table:table-cell>
          <table:table-cell office:value-type="float" office:value="37" calcext:value-type="float">
            <text:p>37</text:p>
          </table:table-cell>
          <table:table-cell table:formula="of:=COUNTIF([.$R$1:.$R$222];[.T38])" office:value-type="float" office:value="4" calcext:value-type="float">
            <text:p>4</text:p>
          </table:table-cell>
          <table:table-cell/>
          <table:table-cell table:formula="of:=SUM([.G38];[.R38])" office:value-type="float" office:value="52" calcext:value-type="float">
            <text:p>5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W$1:.W$222];[.Y3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30408" calcext:value-type="float">
            <text:p>6323040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G$1:.$G$222];[.I39])" office:value-type="float" office:value="4" calcext:value-type="float">
            <text:p>4</text:p>
          </table:table-cell>
          <table:table-cell/>
          <table:table-cell office:value-type="float" office:value="63230408" calcext:value-type="float">
            <text:p>6323040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39]=0;[.R39]&gt;0); &quot;:o&quot;; &quot;&quot;)">
            <text:p/>
          </table:table-cell>
          <table:table-cell office:value-type="float" office:value="38" calcext:value-type="float">
            <text:p>38</text:p>
          </table:table-cell>
          <table:table-cell table:formula="of:=COUNTIF([.$R$1:.$R$222];[.T39])" office:value-type="float" office:value="2" calcext:value-type="float">
            <text:p>2</text:p>
          </table:table-cell>
          <table:table-cell/>
          <table:table-cell table:formula="of:=SUM([.G39];[.R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W$1:.W$222];[.Y3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60" calcext:value-type="float">
            <text:p>632500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G$1:.$G$222];[.I40])" office:value-type="float" office:value="1" calcext:value-type="float">
            <text:p>1</text:p>
          </table:table-cell>
          <table:table-cell/>
          <table:table-cell office:value-type="float" office:value="63250060" calcext:value-type="float">
            <text:p>6325006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AND([.G40]=0;[.R40]&gt;0); &quot;:o&quot;; &quot;&quot;)">
            <text:p/>
          </table:table-cell>
          <table:table-cell office:value-type="float" office:value="39" calcext:value-type="float">
            <text:p>39</text:p>
          </table:table-cell>
          <table:table-cell table:formula="of:=COUNTIF([.$R$1:.$R$222];[.T40])" office:value-type="float" office:value="3" calcext:value-type="float">
            <text:p>3</text:p>
          </table:table-cell>
          <table:table-cell/>
          <table:table-cell table:formula="of:=SUM([.G40];[.R40])" office:value-type="float" office:value="135" calcext:value-type="float">
            <text:p>13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W$1:.W$222];[.Y4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67" calcext:value-type="float">
            <text:p>6325006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G$1:.$G$222];[.I41])" office:value-type="float" office:value="3" calcext:value-type="float">
            <text:p>3</text:p>
          </table:table-cell>
          <table:table-cell/>
          <table:table-cell office:value-type="float" office:value="63250067" calcext:value-type="float">
            <text:p>632500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IF(AND([.G41]=0;[.R41]&gt;0); &quot;:o&quot;; &quot;&quot;)">
            <text:p/>
          </table:table-cell>
          <table:table-cell office:value-type="float" office:value="40" calcext:value-type="float">
            <text:p>40</text:p>
          </table:table-cell>
          <table:table-cell table:formula="of:=COUNTIF([.$R$1:.$R$222];[.T41])" office:value-type="float" office:value="1" calcext:value-type="float">
            <text:p>1</text:p>
          </table:table-cell>
          <table:table-cell/>
          <table:table-cell table:formula="of:=SUM([.G41];[.R41])" office:value-type="float" office:value="95" calcext:value-type="float">
            <text:p>9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W$1:.W$222];[.Y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68" calcext:value-type="float">
            <text:p>6325006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G$1:.$G$222];[.I42])" office:value-type="float" office:value="9" calcext:value-type="float">
            <text:p>9</text:p>
          </table:table-cell>
          <table:table-cell/>
          <table:table-cell office:value-type="float" office:value="63250068" calcext:value-type="float">
            <text:p>6325006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F(AND([.G42]=0;[.R42]&gt;0); &quot;:o&quot;; &quot;&quot;)">
            <text:p/>
          </table:table-cell>
          <table:table-cell office:value-type="float" office:value="41" calcext:value-type="float">
            <text:p>41</text:p>
          </table:table-cell>
          <table:table-cell table:formula="of:=COUNTIF([.$R$1:.$R$222];[.T42])" office:value-type="float" office:value="2" calcext:value-type="float">
            <text:p>2</text:p>
          </table:table-cell>
          <table:table-cell/>
          <table:table-cell table:formula="of:=SUM([.G42];[.R42])" office:value-type="float" office:value="91" calcext:value-type="float">
            <text:p>9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W$1:.W$222];[.Y42])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70" calcext:value-type="float">
            <text:p>632500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G$1:.$G$222];[.I43])" office:value-type="float" office:value="2" calcext:value-type="float">
            <text:p>2</text:p>
          </table:table-cell>
          <table:table-cell/>
          <table:table-cell office:value-type="float" office:value="63250070" calcext:value-type="float">
            <text:p>6325007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AND([.G43]=0;[.R43]&gt;0); &quot;:o&quot;; &quot;&quot;)">
            <text:p/>
          </table:table-cell>
          <table:table-cell office:value-type="float" office:value="42" calcext:value-type="float">
            <text:p>42</text:p>
          </table:table-cell>
          <table:table-cell table:formula="of:=COUNTIF([.$R$1:.$R$222];[.T43])" office:value-type="float" office:value="0" calcext:value-type="float">
            <text:p>0</text:p>
          </table:table-cell>
          <table:table-cell/>
          <table:table-cell table:formula="of:=SUM([.G43];[.R43])" office:value-type="float" office:value="115" calcext:value-type="float">
            <text:p>11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W$1:.W$222];[.Y4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72" calcext:value-type="float">
            <text:p>632500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G$1:.$G$222];[.I44])" office:value-type="float" office:value="5" calcext:value-type="float">
            <text:p>5</text:p>
          </table:table-cell>
          <table:table-cell/>
          <table:table-cell office:value-type="float" office:value="63250072" calcext:value-type="float">
            <text:p>6325007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44]=0;[.R44]&gt;0); &quot;:o&quot;; &quot;&quot;)">
            <text:p/>
          </table:table-cell>
          <table:table-cell office:value-type="float" office:value="43" calcext:value-type="float">
            <text:p>43</text:p>
          </table:table-cell>
          <table:table-cell table:formula="of:=COUNTIF([.$R$1:.$R$222];[.T44])" office:value-type="float" office:value="2" calcext:value-type="float">
            <text:p>2</text:p>
          </table:table-cell>
          <table:table-cell/>
          <table:table-cell table:formula="of:=SUM([.G44];[.R44])" office:value-type="float" office:value="25" calcext:value-type="float">
            <text:p>2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W$1:.W$222];[.Y4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74" calcext:value-type="float">
            <text:p>632500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G$1:.$G$222];[.I45])" office:value-type="float" office:value="2" calcext:value-type="float">
            <text:p>2</text:p>
          </table:table-cell>
          <table:table-cell/>
          <table:table-cell office:value-type="float" office:value="63250074" calcext:value-type="float">
            <text:p>632500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AND([.G45]=0;[.R45]&gt;0); &quot;:o&quot;; &quot;&quot;)">
            <text:p/>
          </table:table-cell>
          <table:table-cell office:value-type="float" office:value="44" calcext:value-type="float">
            <text:p>44</text:p>
          </table:table-cell>
          <table:table-cell table:formula="of:=COUNTIF([.$R$1:.$R$222];[.T45])" office:value-type="float" office:value="4" calcext:value-type="float">
            <text:p>4</text:p>
          </table:table-cell>
          <table:table-cell/>
          <table:table-cell table:formula="of:=SUM([.G45];[.R45])" office:value-type="float" office:value="67" calcext:value-type="float">
            <text:p>6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W$1:.W$222];[.Y4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75" calcext:value-type="float">
            <text:p>6325007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G$1:.$G$222];[.I46])" office:value-type="float" office:value="3" calcext:value-type="float">
            <text:p>3</text:p>
          </table:table-cell>
          <table:table-cell/>
          <table:table-cell office:value-type="float" office:value="63250075" calcext:value-type="float">
            <text:p>632500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AND([.G46]=0;[.R46]&gt;0); &quot;:o&quot;; &quot;&quot;)">
            <text:p/>
          </table:table-cell>
          <table:table-cell office:value-type="float" office:value="45" calcext:value-type="float">
            <text:p>45</text:p>
          </table:table-cell>
          <table:table-cell table:formula="of:=COUNTIF([.$R$1:.$R$222];[.T46])" office:value-type="float" office:value="2" calcext:value-type="float">
            <text:p>2</text:p>
          </table:table-cell>
          <table:table-cell/>
          <table:table-cell table:formula="of:=SUM([.G46];[.R46])" office:value-type="float" office:value="157" calcext:value-type="float">
            <text:p>15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W$1:.W$222];[.Y4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77" calcext:value-type="float">
            <text:p>632500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G$1:.$G$222];[.I47])" office:value-type="float" office:value="1" calcext:value-type="float">
            <text:p>1</text:p>
          </table:table-cell>
          <table:table-cell/>
          <table:table-cell office:value-type="float" office:value="63250077" calcext:value-type="float">
            <text:p>6325007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formula="of:=IF(AND([.G47]=0;[.R47]&gt;0); &quot;:o&quot;; &quot;&quot;)">
            <text:p/>
          </table:table-cell>
          <table:table-cell office:value-type="float" office:value="46" calcext:value-type="float">
            <text:p>46</text:p>
          </table:table-cell>
          <table:table-cell table:formula="of:=COUNTIF([.$R$1:.$R$222];[.T47])" office:value-type="float" office:value="1" calcext:value-type="float">
            <text:p>1</text:p>
          </table:table-cell>
          <table:table-cell/>
          <table:table-cell table:formula="of:=SUM([.G47];[.R47])" office:value-type="float" office:value="211" calcext:value-type="float">
            <text:p>21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W$1:.W$222];[.Y4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99" calcext:value-type="float">
            <text:p>6325049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G$1:.$G$222];[.I48])" office:value-type="float" office:value="6" calcext:value-type="float">
            <text:p>6</text:p>
          </table:table-cell>
          <table:table-cell/>
          <table:table-cell office:value-type="float" office:value="63250499" calcext:value-type="float">
            <text:p>6325049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(AND([.G48]=0;[.R48]&gt;0); &quot;:o&quot;; &quot;&quot;)">
            <text:p/>
          </table:table-cell>
          <table:table-cell office:value-type="float" office:value="47" calcext:value-type="float">
            <text:p>47</text:p>
          </table:table-cell>
          <table:table-cell table:formula="of:=COUNTIF([.$R$1:.$R$222];[.T48])" office:value-type="float" office:value="2" calcext:value-type="float">
            <text:p>2</text:p>
          </table:table-cell>
          <table:table-cell/>
          <table:table-cell table:formula="of:=SUM([.G48];[.R48])" office:value-type="float" office:value="66" calcext:value-type="float">
            <text:p>6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W$1:.W$222];[.Y4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80" calcext:value-type="float">
            <text:p>6325008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G$1:.$G$222];[.I49])" office:value-type="float" office:value="4" calcext:value-type="float">
            <text:p>4</text:p>
          </table:table-cell>
          <table:table-cell/>
          <table:table-cell office:value-type="float" office:value="63250080" calcext:value-type="float">
            <text:p>6325008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AND([.G49]=0;[.R49]&gt;0); &quot;:o&quot;; &quot;&quot;)">
            <text:p/>
          </table:table-cell>
          <table:table-cell office:value-type="float" office:value="48" calcext:value-type="float">
            <text:p>48</text:p>
          </table:table-cell>
          <table:table-cell table:formula="of:=COUNTIF([.$R$1:.$R$222];[.T49])" office:value-type="float" office:value="2" calcext:value-type="float">
            <text:p>2</text:p>
          </table:table-cell>
          <table:table-cell/>
          <table:table-cell table:formula="of:=SUM([.G49];[.R49])" office:value-type="float" office:value="88" calcext:value-type="float">
            <text:p>8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W$1:.W$222];[.Y4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90" calcext:value-type="float">
            <text:p>6324009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G$1:.$G$222];[.I50])" office:value-type="float" office:value="2" calcext:value-type="float">
            <text:p>2</text:p>
          </table:table-cell>
          <table:table-cell/>
          <table:table-cell office:value-type="float" office:value="63240090" calcext:value-type="float">
            <text:p>6324009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IF(AND([.G50]=0;[.R50]&gt;0); &quot;:o&quot;; &quot;&quot;)">
            <text:p/>
          </table:table-cell>
          <table:table-cell office:value-type="float" office:value="49" calcext:value-type="float">
            <text:p>49</text:p>
          </table:table-cell>
          <table:table-cell table:formula="of:=COUNTIF([.$R$1:.$R$222];[.T50])" office:value-type="float" office:value="0" calcext:value-type="float">
            <text:p>0</text:p>
          </table:table-cell>
          <table:table-cell/>
          <table:table-cell table:formula="of:=SUM([.G50];[.R50])" office:value-type="float" office:value="133" calcext:value-type="float">
            <text:p>13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W$1:.W$222];[.Y5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73" calcext:value-type="float">
            <text:p>6325037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G$1:.$G$222];[.I51])" office:value-type="float" office:value="2" calcext:value-type="float">
            <text:p>2</text:p>
          </table:table-cell>
          <table:table-cell/>
          <table:table-cell office:value-type="float" office:value="63250373" calcext:value-type="float">
            <text:p>6325037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51]=0;[.R51]&gt;0); &quot;:o&quot;; &quot;&quot;)">
            <text:p/>
          </table:table-cell>
          <table:table-cell office:value-type="float" office:value="50" calcext:value-type="float">
            <text:p>50</text:p>
          </table:table-cell>
          <table:table-cell table:formula="of:=COUNTIF([.$R$1:.$R$222];[.T51])" office:value-type="float" office:value="2" calcext:value-type="float">
            <text:p>2</text:p>
          </table:table-cell>
          <table:table-cell/>
          <table:table-cell table:formula="of:=SUM([.G51];[.R51])" office:value-type="float" office:value="71" calcext:value-type="float">
            <text:p>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W$1:.W$222];[.Y5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96" calcext:value-type="float">
            <text:p>6324009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G$1:.$G$222];[.I52])" office:value-type="float" office:value="2" calcext:value-type="float">
            <text:p>2</text:p>
          </table:table-cell>
          <table:table-cell/>
          <table:table-cell office:value-type="float" office:value="63240096" calcext:value-type="float">
            <text:p>6324009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AND([.G52]=0;[.R52]&gt;0); &quot;:o&quot;; &quot;&quot;)">
            <text:p/>
          </table:table-cell>
          <table:table-cell office:value-type="float" office:value="51" calcext:value-type="float">
            <text:p>51</text:p>
          </table:table-cell>
          <table:table-cell table:formula="of:=COUNTIF([.$R$1:.$R$222];[.T52])" office:value-type="float" office:value="3" calcext:value-type="float">
            <text:p>3</text:p>
          </table:table-cell>
          <table:table-cell/>
          <table:table-cell table:formula="of:=SUM([.G52];[.R52])" office:value-type="float" office:value="112" calcext:value-type="float">
            <text:p>11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W$1:.W$222];[.Y5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84" calcext:value-type="float">
            <text:p>6325008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G$1:.$G$222];[.I53])" office:value-type="float" office:value="3" calcext:value-type="float">
            <text:p>3</text:p>
          </table:table-cell>
          <table:table-cell/>
          <table:table-cell office:value-type="float" office:value="63250084" calcext:value-type="float">
            <text:p>6325008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IF(AND([.G53]=0;[.R53]&gt;0); &quot;:o&quot;; &quot;&quot;)">
            <text:p/>
          </table:table-cell>
          <table:table-cell office:value-type="float" office:value="52" calcext:value-type="float">
            <text:p>52</text:p>
          </table:table-cell>
          <table:table-cell table:formula="of:=COUNTIF([.$R$1:.$R$222];[.T53])" office:value-type="float" office:value="2" calcext:value-type="float">
            <text:p>2</text:p>
          </table:table-cell>
          <table:table-cell/>
          <table:table-cell table:formula="of:=SUM([.G53];[.R53])" office:value-type="float" office:value="178" calcext:value-type="float">
            <text:p>17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W$1:.W$222];[.Y53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097" calcext:value-type="float">
            <text:p>6324009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G$1:.$G$222];[.I54])" office:value-type="float" office:value="2" calcext:value-type="float">
            <text:p>2</text:p>
          </table:table-cell>
          <table:table-cell/>
          <table:table-cell office:value-type="float" office:value="63240097" calcext:value-type="float">
            <text:p>6324009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54]=0;[.R54]&gt;0); &quot;:o&quot;; &quot;&quot;)">
            <text:p/>
          </table:table-cell>
          <table:table-cell office:value-type="float" office:value="53" calcext:value-type="float">
            <text:p>53</text:p>
          </table:table-cell>
          <table:table-cell table:formula="of:=COUNTIF([.$R$1:.$R$222];[.T54])" office:value-type="float" office:value="2" calcext:value-type="float">
            <text:p>2</text:p>
          </table:table-cell>
          <table:table-cell/>
          <table:table-cell table:formula="of:=SUM([.G54];[.R54])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W$1:.W$222];[.Y5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85" calcext:value-type="float">
            <text:p>6325008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G$1:.$G$222];[.I55])" office:value-type="float" office:value="5" calcext:value-type="float">
            <text:p>5</text:p>
          </table:table-cell>
          <table:table-cell/>
          <table:table-cell office:value-type="float" office:value="63250085" calcext:value-type="float">
            <text:p>6325008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55]=0;[.R55]&gt;0); &quot;:o&quot;; &quot;&quot;)">
            <text:p/>
          </table:table-cell>
          <table:table-cell office:value-type="float" office:value="54" calcext:value-type="float">
            <text:p>54</text:p>
          </table:table-cell>
          <table:table-cell table:formula="of:=COUNTIF([.$R$1:.$R$222];[.T55])" office:value-type="float" office:value="5" calcext:value-type="float">
            <text:p>5</text:p>
          </table:table-cell>
          <table:table-cell/>
          <table:table-cell table:formula="of:=SUM([.G55];[.R55])"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W$1:.W$222];[.Y5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88" calcext:value-type="float">
            <text:p>6325008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G$1:.$G$222];[.I56])" office:value-type="float" office:value="1" calcext:value-type="float">
            <text:p>1</text:p>
          </table:table-cell>
          <table:table-cell/>
          <table:table-cell office:value-type="float" office:value="63250088" calcext:value-type="float">
            <text:p>6325008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AND([.G56]=0;[.R56]&gt;0); &quot;:o&quot;; &quot;&quot;)">
            <text:p/>
          </table:table-cell>
          <table:table-cell office:value-type="float" office:value="55" calcext:value-type="float">
            <text:p>55</text:p>
          </table:table-cell>
          <table:table-cell table:formula="of:=COUNTIF([.$R$1:.$R$222];[.T56])" office:value-type="float" office:value="2" calcext:value-type="float">
            <text:p>2</text:p>
          </table:table-cell>
          <table:table-cell/>
          <table:table-cell table:formula="of:=SUM([.G56];[.R56])" office:value-type="float" office:value="86" calcext:value-type="float">
            <text:p>8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W$1:.W$222];[.Y5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30098" calcext:value-type="float">
            <text:p>632300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G$1:.$G$222];[.I57])" office:value-type="float" office:value="2" calcext:value-type="float">
            <text:p>2</text:p>
          </table:table-cell>
          <table:table-cell/>
          <table:table-cell office:value-type="float" office:value="63230098" calcext:value-type="float">
            <text:p>632300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(AND([.G57]=0;[.R57]&gt;0); &quot;:o&quot;; &quot;&quot;)">
            <text:p/>
          </table:table-cell>
          <table:table-cell office:value-type="float" office:value="56" calcext:value-type="float">
            <text:p>56</text:p>
          </table:table-cell>
          <table:table-cell table:formula="of:=COUNTIF([.$R$1:.$R$222];[.T57])" office:value-type="float" office:value="2" calcext:value-type="float">
            <text:p>2</text:p>
          </table:table-cell>
          <table:table-cell/>
          <table:table-cell table:formula="of:=SUM([.G57];[.R57])" office:value-type="float" office:value="160" calcext:value-type="float">
            <text:p>16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W$1:.W$222];[.Y5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91" calcext:value-type="float">
            <text:p>6325009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G$1:.$G$222];[.I58])" office:value-type="float" office:value="2" calcext:value-type="float">
            <text:p>2</text:p>
          </table:table-cell>
          <table:table-cell/>
          <table:table-cell office:value-type="float" office:value="63250091" calcext:value-type="float">
            <text:p>6325009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58]=0;[.R58]&gt;0); &quot;:o&quot;; &quot;&quot;)">
            <text:p/>
          </table:table-cell>
          <table:table-cell office:value-type="float" office:value="57" calcext:value-type="float">
            <text:p>57</text:p>
          </table:table-cell>
          <table:table-cell table:formula="of:=COUNTIF([.$R$1:.$R$222];[.T58])" office:value-type="float" office:value="2" calcext:value-type="float">
            <text:p>2</text:p>
          </table:table-cell>
          <table:table-cell/>
          <table:table-cell table:formula="of:=SUM([.G58];[.R58])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W$1:.W$222];[.Y5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77" calcext:value-type="float">
            <text:p>632503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G$1:.$G$222];[.I59])" office:value-type="float" office:value="1" calcext:value-type="float">
            <text:p>1</text:p>
          </table:table-cell>
          <table:table-cell/>
          <table:table-cell office:value-type="float" office:value="63250377" calcext:value-type="float">
            <text:p>632503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IF(AND([.G59]=0;[.R59]&gt;0); &quot;:o&quot;; &quot;&quot;)">
            <text:p/>
          </table:table-cell>
          <table:table-cell office:value-type="float" office:value="58" calcext:value-type="float">
            <text:p>58</text:p>
          </table:table-cell>
          <table:table-cell table:formula="of:=COUNTIF([.$R$1:.$R$222];[.T59])" office:value-type="float" office:value="1" calcext:value-type="float">
            <text:p>1</text:p>
          </table:table-cell>
          <table:table-cell/>
          <table:table-cell table:formula="of:=SUM([.G59];[.R59])"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W$1:.W$222];[.Y5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92" calcext:value-type="float">
            <text:p>6325009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G$1:.$G$222];[.I60])" office:value-type="float" office:value="3" calcext:value-type="float">
            <text:p>3</text:p>
          </table:table-cell>
          <table:table-cell/>
          <table:table-cell office:value-type="float" office:value="63250092" calcext:value-type="float">
            <text:p>63250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60]=0;[.R60]&gt;0); &quot;:o&quot;; &quot;&quot;)">
            <text:p/>
          </table:table-cell>
          <table:table-cell office:value-type="float" office:value="59" calcext:value-type="float">
            <text:p>59</text:p>
          </table:table-cell>
          <table:table-cell table:formula="of:=COUNTIF([.$R$1:.$R$222];[.T60])" office:value-type="float" office:value="2" calcext:value-type="float">
            <text:p>2</text:p>
          </table:table-cell>
          <table:table-cell/>
          <table:table-cell table:formula="of:=SUM([.G60];[.R60])"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W$1:.W$222];[.Y6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94" calcext:value-type="float">
            <text:p>6324039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G$1:.$G$222];[.I61])" office:value-type="float" office:value="1" calcext:value-type="float">
            <text:p>1</text:p>
          </table:table-cell>
          <table:table-cell/>
          <table:table-cell office:value-type="float" office:value="63240394" calcext:value-type="float">
            <text:p>632403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61]=0;[.R61]&gt;0); &quot;:o&quot;; &quot;&quot;)">
            <text:p/>
          </table:table-cell>
          <table:table-cell office:value-type="float" office:value="60" calcext:value-type="float">
            <text:p>60</text:p>
          </table:table-cell>
          <table:table-cell table:formula="of:=COUNTIF([.$R$1:.$R$222];[.T61])" office:value-type="float" office:value="1" calcext:value-type="float">
            <text:p>1</text:p>
          </table:table-cell>
          <table:table-cell/>
          <table:table-cell table:formula="of:=SUM([.G61];[.R61])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W$1:.W$222];[.Y61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96" calcext:value-type="float">
            <text:p>6325009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G$1:.$G$222];[.I62])" office:value-type="float" office:value="3" calcext:value-type="float">
            <text:p>3</text:p>
          </table:table-cell>
          <table:table-cell/>
          <table:table-cell office:value-type="float" office:value="63250096" calcext:value-type="float">
            <text:p>632500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AND([.G62]=0;[.R62]&gt;0); &quot;:o&quot;; &quot;&quot;)">
            <text:p/>
          </table:table-cell>
          <table:table-cell office:value-type="float" office:value="61" calcext:value-type="float">
            <text:p>61</text:p>
          </table:table-cell>
          <table:table-cell table:formula="of:=COUNTIF([.$R$1:.$R$222];[.T62])" office:value-type="float" office:value="1" calcext:value-type="float">
            <text:p>1</text:p>
          </table:table-cell>
          <table:table-cell/>
          <table:table-cell table:formula="of:=SUM([.G62];[.R62])" office:value-type="float" office:value="58" calcext:value-type="float">
            <text:p>5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W$1:.W$222];[.Y6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097" calcext:value-type="float">
            <text:p>6325009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$G$1:.$G$222];[.I63])" office:value-type="float" office:value="3" calcext:value-type="float">
            <text:p>3</text:p>
          </table:table-cell>
          <table:table-cell/>
          <table:table-cell office:value-type="float" office:value="63250097" calcext:value-type="float">
            <text:p>6325009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AND([.G63]=0;[.R63]&gt;0); &quot;:o&quot;; &quot;&quot;)">
            <text:p/>
          </table:table-cell>
          <table:table-cell office:value-type="float" office:value="62" calcext:value-type="float">
            <text:p>62</text:p>
          </table:table-cell>
          <table:table-cell table:formula="of:=COUNTIF([.$R$1:.$R$222];[.T63])" office:value-type="float" office:value="2" calcext:value-type="float">
            <text:p>2</text:p>
          </table:table-cell>
          <table:table-cell/>
          <table:table-cell table:formula="of:=SUM([.G63];[.R63])" office:value-type="float" office:value="57" calcext:value-type="float">
            <text:p>5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W$1:.W$222];[.Y6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20515" calcext:value-type="float">
            <text:p>632205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$G$1:.$G$222];[.I64])" office:value-type="float" office:value="2" calcext:value-type="float">
            <text:p>2</text:p>
          </table:table-cell>
          <table:table-cell/>
          <table:table-cell office:value-type="float" office:value="63220515" calcext:value-type="float">
            <text:p>632205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64]=0;[.R64]&gt;0); &quot;:o&quot;; &quot;&quot;)">
            <text:p/>
          </table:table-cell>
          <table:table-cell office:value-type="float" office:value="63" calcext:value-type="float">
            <text:p>63</text:p>
          </table:table-cell>
          <table:table-cell table:formula="of:=COUNTIF([.$R$1:.$R$222];[.T64])" office:value-type="float" office:value="2" calcext:value-type="float">
            <text:p>2</text:p>
          </table:table-cell>
          <table:table-cell/>
          <table:table-cell table:formula="of:=SUM([.G64];[.R64])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W$1:.W$222];[.Y6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0" calcext:value-type="float">
            <text:p>632501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$G$1:.$G$222];[.I65])" office:value-type="float" office:value="2" calcext:value-type="float">
            <text:p>2</text:p>
          </table:table-cell>
          <table:table-cell/>
          <table:table-cell office:value-type="float" office:value="63250100" calcext:value-type="float">
            <text:p>63250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65]=0;[.R65]&gt;0); &quot;:o&quot;; &quot;&quot;)">
            <text:p/>
          </table:table-cell>
          <table:table-cell office:value-type="float" office:value="64" calcext:value-type="float">
            <text:p>64</text:p>
          </table:table-cell>
          <table:table-cell table:formula="of:=COUNTIF([.$R$1:.$R$222];[.T65])" office:value-type="float" office:value="0" calcext:value-type="float">
            <text:p>0</text:p>
          </table:table-cell>
          <table:table-cell/>
          <table:table-cell table:formula="of:=SUM([.G65];[.R65])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W$1:.W$222];[.Y6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1" calcext:value-type="float">
            <text:p>6325010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$G$1:.$G$222];[.I66])" office:value-type="float" office:value="1" calcext:value-type="float">
            <text:p>1</text:p>
          </table:table-cell>
          <table:table-cell/>
          <table:table-cell office:value-type="float" office:value="63250101" calcext:value-type="float">
            <text:p>632501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IF(AND([.G66]=0;[.R66]&gt;0); &quot;:o&quot;; &quot;&quot;)">
            <text:p/>
          </table:table-cell>
          <table:table-cell office:value-type="float" office:value="65" calcext:value-type="float">
            <text:p>65</text:p>
          </table:table-cell>
          <table:table-cell table:formula="of:=COUNTIF([.$R$1:.$R$222];[.T66])" office:value-type="float" office:value="2" calcext:value-type="float">
            <text:p>2</text:p>
          </table:table-cell>
          <table:table-cell/>
          <table:table-cell table:formula="of:=SUM([.G66];[.R66])" office:value-type="float" office:value="102" calcext:value-type="float">
            <text:p>10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W$1:.W$222];[.Y6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113" calcext:value-type="float">
            <text:p>632401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$G$1:.$G$222];[.I67])" office:value-type="float" office:value="2" calcext:value-type="float">
            <text:p>2</text:p>
          </table:table-cell>
          <table:table-cell/>
          <table:table-cell office:value-type="float" office:value="63240113" calcext:value-type="float">
            <text:p>632401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AND([.G67]=0;[.R67]&gt;0); &quot;:o&quot;; &quot;&quot;)">
            <text:p/>
          </table:table-cell>
          <table:table-cell office:value-type="float" office:value="66" calcext:value-type="float">
            <text:p>66</text:p>
          </table:table-cell>
          <table:table-cell table:formula="of:=COUNTIF([.$R$1:.$R$222];[.T67])" office:value-type="float" office:value="1" calcext:value-type="float">
            <text:p>1</text:p>
          </table:table-cell>
          <table:table-cell/>
          <table:table-cell table:formula="of:=SUM([.G67];[.R67])" office:value-type="float" office:value="124" calcext:value-type="float">
            <text:p>12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W$1:.W$222];[.Y6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2" calcext:value-type="float">
            <text:p>6325010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G$1:.$G$222];[.I68])" office:value-type="float" office:value="1" calcext:value-type="float">
            <text:p>1</text:p>
          </table:table-cell>
          <table:table-cell/>
          <table:table-cell office:value-type="float" office:value="63250102" calcext:value-type="float">
            <text:p>6325010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AND([.G68]=0;[.R68]&gt;0); &quot;:o&quot;; &quot;&quot;)">
            <text:p/>
          </table:table-cell>
          <table:table-cell office:value-type="float" office:value="67" calcext:value-type="float">
            <text:p>67</text:p>
          </table:table-cell>
          <table:table-cell table:formula="of:=COUNTIF([.$R$1:.$R$222];[.T68])" office:value-type="float" office:value="1" calcext:value-type="float">
            <text:p>1</text:p>
          </table:table-cell>
          <table:table-cell/>
          <table:table-cell table:formula="of:=SUM([.G68];[.R68])" office:value-type="float" office:value="87" calcext:value-type="float">
            <text:p>8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W$1:.W$222];[.Y68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4" calcext:value-type="float">
            <text:p>6325010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G$1:.$G$222];[.I69])" office:value-type="float" office:value="1" calcext:value-type="float">
            <text:p>1</text:p>
          </table:table-cell>
          <table:table-cell/>
          <table:table-cell office:value-type="float" office:value="63250104" calcext:value-type="float">
            <text:p>6325010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AND([.G69]=0;[.R69]&gt;0); &quot;:o&quot;; &quot;&quot;)">
            <text:p/>
          </table:table-cell>
          <table:table-cell office:value-type="float" office:value="68" calcext:value-type="float">
            <text:p>68</text:p>
          </table:table-cell>
          <table:table-cell table:formula="of:=COUNTIF([.$R$1:.$R$222];[.T69])" office:value-type="float" office:value="1" calcext:value-type="float">
            <text:p>1</text:p>
          </table:table-cell>
          <table:table-cell/>
          <table:table-cell table:formula="of:=SUM([.G69];[.R69])"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W$1:.W$222];[.Y6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78" calcext:value-type="float">
            <text:p>6325037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G$1:.$G$222];[.I70])" office:value-type="float" office:value="0" calcext:value-type="float">
            <text:p>0</text:p>
          </table:table-cell>
          <table:table-cell/>
          <table:table-cell office:value-type="float" office:value="63250378" calcext:value-type="float">
            <text:p>632503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0]=0;[.R70]&gt;0); &quot;:o&quot;; &quot;&quot;)">
            <text:p/>
          </table:table-cell>
          <table:table-cell office:value-type="float" office:value="69" calcext:value-type="float">
            <text:p>69</text:p>
          </table:table-cell>
          <table:table-cell table:formula="of:=COUNTIF([.$R$1:.$R$222];[.T70])" office:value-type="float" office:value="3" calcext:value-type="float">
            <text:p>3</text:p>
          </table:table-cell>
          <table:table-cell/>
          <table:table-cell table:formula="of:=SUM([.G70];[.R70])"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W$1:.W$222];[.Y7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5" calcext:value-type="float">
            <text:p>6325010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G$1:.$G$222];[.I71])" office:value-type="float" office:value="0" calcext:value-type="float">
            <text:p>0</text:p>
          </table:table-cell>
          <table:table-cell/>
          <table:table-cell office:value-type="float" office:value="63250105" calcext:value-type="float">
            <text:p>6325010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1]=0;[.R71]&gt;0); &quot;:o&quot;; &quot;&quot;)">
            <text:p/>
          </table:table-cell>
          <table:table-cell office:value-type="float" office:value="70" calcext:value-type="float">
            <text:p>70</text:p>
          </table:table-cell>
          <table:table-cell table:formula="of:=COUNTIF([.$R$1:.$R$222];[.T71])" office:value-type="float" office:value="3" calcext:value-type="float">
            <text:p>3</text:p>
          </table:table-cell>
          <table:table-cell/>
          <table:table-cell table:formula="of:=SUM([.G71];[.R71])"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W$1:.W$222];[.Y7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06" calcext:value-type="float">
            <text:p>6325010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$G$1:.$G$222];[.I72])" office:value-type="float" office:value="4" calcext:value-type="float">
            <text:p>4</text:p>
          </table:table-cell>
          <table:table-cell/>
          <table:table-cell office:value-type="float" office:value="63250106" calcext:value-type="float">
            <text:p>6325010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2]=0;[.R72]&gt;0); &quot;:o&quot;; &quot;&quot;)">
            <text:p/>
          </table:table-cell>
          <table:table-cell office:value-type="float" office:value="71" calcext:value-type="float">
            <text:p>71</text:p>
          </table:table-cell>
          <table:table-cell table:formula="of:=COUNTIF([.$R$1:.$R$222];[.T72])" office:value-type="float" office:value="4" calcext:value-type="float">
            <text:p>4</text:p>
          </table:table-cell>
          <table:table-cell/>
          <table:table-cell table:formula="of:=SUM([.G72];[.R72])"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W$1:.W$222];[.Y7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13" calcext:value-type="float">
            <text:p>632501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$G$1:.$G$222];[.I73])" office:value-type="float" office:value="2" calcext:value-type="float">
            <text:p>2</text:p>
          </table:table-cell>
          <table:table-cell/>
          <table:table-cell office:value-type="float" office:value="63250113" calcext:value-type="float">
            <text:p>632501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IF(AND([.G73]=0;[.R73]&gt;0); &quot;:o&quot;; &quot;&quot;)">
            <text:p/>
          </table:table-cell>
          <table:table-cell office:value-type="float" office:value="72" calcext:value-type="float">
            <text:p>72</text:p>
          </table:table-cell>
          <table:table-cell table:formula="of:=COUNTIF([.$R$1:.$R$222];[.T73])" office:value-type="float" office:value="1" calcext:value-type="float">
            <text:p>1</text:p>
          </table:table-cell>
          <table:table-cell/>
          <table:table-cell table:formula="of:=SUM([.G73];[.R73])" office:value-type="float" office:value="147" calcext:value-type="float">
            <text:p>14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W$1:.W$222];[.Y73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15" calcext:value-type="float">
            <text:p>632501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$G$1:.$G$222];[.I74])" office:value-type="float" office:value="1" calcext:value-type="float">
            <text:p>1</text:p>
          </table:table-cell>
          <table:table-cell/>
          <table:table-cell office:value-type="float" office:value="63250115" calcext:value-type="float">
            <text:p>632501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AND([.G74]=0;[.R74]&gt;0); &quot;:o&quot;; &quot;&quot;)">
            <text:p/>
          </table:table-cell>
          <table:table-cell office:value-type="float" office:value="73" calcext:value-type="float">
            <text:p>73</text:p>
          </table:table-cell>
          <table:table-cell table:formula="of:=COUNTIF([.$R$1:.$R$222];[.T74])" office:value-type="float" office:value="0" calcext:value-type="float">
            <text:p>0</text:p>
          </table:table-cell>
          <table:table-cell/>
          <table:table-cell table:formula="of:=SUM([.G74];[.R74])" office:value-type="float" office:value="101" calcext:value-type="float">
            <text:p>10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W$1:.W$222];[.Y7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16" calcext:value-type="float">
            <text:p>632501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$G$1:.$G$222];[.I75])" office:value-type="float" office:value="1" calcext:value-type="float">
            <text:p>1</text:p>
          </table:table-cell>
          <table:table-cell/>
          <table:table-cell office:value-type="float" office:value="63250116" calcext:value-type="float">
            <text:p>632501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AND([.G75]=0;[.R75]&gt;0); &quot;:o&quot;; &quot;&quot;)">
            <text:p/>
          </table:table-cell>
          <table:table-cell office:value-type="float" office:value="74" calcext:value-type="float">
            <text:p>74</text:p>
          </table:table-cell>
          <table:table-cell table:formula="of:=COUNTIF([.$R$1:.$R$222];[.T75])" office:value-type="float" office:value="5" calcext:value-type="float">
            <text:p>5</text:p>
          </table:table-cell>
          <table:table-cell/>
          <table:table-cell table:formula="of:=SUM([.G75];[.R75])" office:value-type="float" office:value="110" calcext:value-type="float">
            <text:p>11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W$1:.W$222];[.Y75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18" calcext:value-type="float">
            <text:p>632501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$G$1:.$G$222];[.I76])" office:value-type="float" office:value="0" calcext:value-type="float">
            <text:p>0</text:p>
          </table:table-cell>
          <table:table-cell/>
          <table:table-cell office:value-type="float" office:value="63250118" calcext:value-type="float">
            <text:p>632501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6]=0;[.R76]&gt;0); &quot;:o&quot;; &quot;&quot;)">
            <text:p/>
          </table:table-cell>
          <table:table-cell office:value-type="float" office:value="75" calcext:value-type="float">
            <text:p>75</text:p>
          </table:table-cell>
          <table:table-cell table:formula="of:=COUNTIF([.$R$1:.$R$222];[.T76])" office:value-type="float" office:value="2" calcext:value-type="float">
            <text:p>2</text:p>
          </table:table-cell>
          <table:table-cell/>
          <table:table-cell table:formula="of:=SUM([.G76];[.R76])" office:value-type="float" office:value="35" calcext:value-type="float">
            <text:p>3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W$1:.W$222];[.Y76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83" calcext:value-type="float">
            <text:p>6325048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$G$1:.$G$222];[.I77])" office:value-type="float" office:value="1" calcext:value-type="float">
            <text:p>1</text:p>
          </table:table-cell>
          <table:table-cell/>
          <table:table-cell office:value-type="float" office:value="63250483" calcext:value-type="float">
            <text:p>6325048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7]=0;[.R77]&gt;0); &quot;:o&quot;; &quot;&quot;)">
            <text:p/>
          </table:table-cell>
          <table:table-cell office:value-type="float" office:value="76" calcext:value-type="float">
            <text:p>76</text:p>
          </table:table-cell>
          <table:table-cell table:formula="of:=COUNTIF([.$R$1:.$R$222];[.T77])" office:value-type="float" office:value="1" calcext:value-type="float">
            <text:p>1</text:p>
          </table:table-cell>
          <table:table-cell/>
          <table:table-cell table:formula="of:=SUM([.G77];[.R77])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W$1:.W$222];[.Y7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0" calcext:value-type="float">
            <text:p>632501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$G$1:.$G$222];[.I78])" office:value-type="float" office:value="1" calcext:value-type="float">
            <text:p>1</text:p>
          </table:table-cell>
          <table:table-cell/>
          <table:table-cell office:value-type="float" office:value="63250120" calcext:value-type="float">
            <text:p>632501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AND([.G78]=0;[.R78]&gt;0); &quot;:o&quot;; &quot;&quot;)">
            <text:p/>
          </table:table-cell>
          <table:table-cell office:value-type="float" office:value="77" calcext:value-type="float">
            <text:p>77</text:p>
          </table:table-cell>
          <table:table-cell table:formula="of:=COUNTIF([.$R$1:.$R$222];[.T78])" office:value-type="float" office:value="0" calcext:value-type="float">
            <text:p>0</text:p>
          </table:table-cell>
          <table:table-cell/>
          <table:table-cell table:formula="of:=SUM([.G78];[.R78])"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W$1:.W$222];[.Y7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1" calcext:value-type="float">
            <text:p>632501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$G$1:.$G$222];[.I79])" office:value-type="float" office:value="0" calcext:value-type="float">
            <text:p>0</text:p>
          </table:table-cell>
          <table:table-cell/>
          <table:table-cell office:value-type="float" office:value="63250121" calcext:value-type="float">
            <text:p>632501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79]=0;[.R79]&gt;0); &quot;:o&quot;; &quot;&quot;)">
            <text:p/>
          </table:table-cell>
          <table:table-cell office:value-type="float" office:value="78" calcext:value-type="float">
            <text:p>78</text:p>
          </table:table-cell>
          <table:table-cell table:formula="of:=COUNTIF([.$R$1:.$R$222];[.T79])" office:value-type="float" office:value="1" calcext:value-type="float">
            <text:p>1</text:p>
          </table:table-cell>
          <table:table-cell/>
          <table:table-cell table:formula="of:=SUM([.G79];[.R79])" office:value-type="float" office:value="41" calcext:value-type="float">
            <text:p>4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W$1:.W$222];[.Y79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2" calcext:value-type="float">
            <text:p>632501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$G$1:.$G$222];[.I80])" office:value-type="float" office:value="0" calcext:value-type="float">
            <text:p>0</text:p>
          </table:table-cell>
          <table:table-cell/>
          <table:table-cell office:value-type="float" office:value="63250122" calcext:value-type="float">
            <text:p>632501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formula="of:=IF(AND([.G80]=0;[.R80]&gt;0); &quot;:o&quot;; &quot;&quot;)">
            <text:p/>
          </table:table-cell>
          <table:table-cell office:value-type="float" office:value="79" calcext:value-type="float">
            <text:p>79</text:p>
          </table:table-cell>
          <table:table-cell table:formula="of:=COUNTIF([.$R$1:.$R$222];[.T80])" office:value-type="float" office:value="0" calcext:value-type="float">
            <text:p>0</text:p>
          </table:table-cell>
          <table:table-cell/>
          <table:table-cell table:formula="of:=SUM([.G80];[.R80])" office:value-type="float" office:value="132" calcext:value-type="float">
            <text:p>13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W$1:.W$222];[.Y8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4" calcext:value-type="float">
            <text:p>632501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$G$1:.$G$222];[.I81])" office:value-type="float" office:value="1" calcext:value-type="float">
            <text:p>1</text:p>
          </table:table-cell>
          <table:table-cell/>
          <table:table-cell office:value-type="float" office:value="63250124" calcext:value-type="float">
            <text:p>632501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AND([.G81]=0;[.R81]&gt;0); &quot;:o&quot;; &quot;&quot;)">
            <text:p/>
          </table:table-cell>
          <table:table-cell office:value-type="float" office:value="80" calcext:value-type="float">
            <text:p>80</text:p>
          </table:table-cell>
          <table:table-cell table:formula="of:=COUNTIF([.$R$1:.$R$222];[.T81])" office:value-type="float" office:value="0" calcext:value-type="float">
            <text:p>0</text:p>
          </table:table-cell>
          <table:table-cell/>
          <table:table-cell table:formula="of:=SUM([.G81];[.R81])" office:value-type="float" office:value="91" calcext:value-type="float">
            <text:p>9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W$1:.W$222];[.Y81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141" calcext:value-type="float">
            <text:p>6324014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$G$1:.$G$222];[.I82])" office:value-type="float" office:value="2" calcext:value-type="float">
            <text:p>2</text:p>
          </table:table-cell>
          <table:table-cell/>
          <table:table-cell office:value-type="float" office:value="63240141" calcext:value-type="float">
            <text:p>6324014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AND([.G82]=0;[.R82]&gt;0); &quot;:o&quot;; &quot;&quot;)">
            <text:p/>
          </table:table-cell>
          <table:table-cell office:value-type="float" office:value="81" calcext:value-type="float">
            <text:p>81</text:p>
          </table:table-cell>
          <table:table-cell table:formula="of:=COUNTIF([.$R$1:.$R$222];[.T82])" office:value-type="float" office:value="0" calcext:value-type="float">
            <text:p>0</text:p>
          </table:table-cell>
          <table:table-cell/>
          <table:table-cell table:formula="of:=SUM([.G82];[.R82])" office:value-type="float" office:value="120" calcext:value-type="float">
            <text:p>12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W$1:.W$222];[.Y82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8" calcext:value-type="float">
            <text:p>6325012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$G$1:.$G$222];[.I83])" office:value-type="float" office:value="0" calcext:value-type="float">
            <text:p>0</text:p>
          </table:table-cell>
          <table:table-cell/>
          <table:table-cell office:value-type="float" office:value="63250128" calcext:value-type="float">
            <text:p>632501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formula="of:=IF(AND([.G83]=0;[.R83]&gt;0); &quot;:o&quot;; &quot;&quot;)">
            <text:p/>
          </table:table-cell>
          <table:table-cell office:value-type="float" office:value="82" calcext:value-type="float">
            <text:p>82</text:p>
          </table:table-cell>
          <table:table-cell table:formula="of:=COUNTIF([.$R$1:.$R$222];[.T83])" office:value-type="float" office:value="0" calcext:value-type="float">
            <text:p>0</text:p>
          </table:table-cell>
          <table:table-cell/>
          <table:table-cell table:formula="of:=SUM([.G83];[.R83])" office:value-type="float" office:value="153" calcext:value-type="float">
            <text:p>15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W$1:.W$222];[.Y8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29" calcext:value-type="float">
            <text:p>632501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$G$1:.$G$222];[.I84])" office:value-type="float" office:value="0" calcext:value-type="float">
            <text:p>0</text:p>
          </table:table-cell>
          <table:table-cell/>
          <table:table-cell office:value-type="float" office:value="63250129" calcext:value-type="float">
            <text:p>632501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IF(AND([.G84]=0;[.R84]&gt;0); &quot;:o&quot;; &quot;&quot;)">
            <text:p/>
          </table:table-cell>
          <table:table-cell office:value-type="float" office:value="83" calcext:value-type="float">
            <text:p>83</text:p>
          </table:table-cell>
          <table:table-cell table:formula="of:=COUNTIF([.$R$1:.$R$222];[.T84])" office:value-type="float" office:value="1" calcext:value-type="float">
            <text:p>1</text:p>
          </table:table-cell>
          <table:table-cell/>
          <table:table-cell table:formula="of:=SUM([.G84];[.R84])"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W$1:.W$222];[.Y84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149" calcext:value-type="float">
            <text:p>6324014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$G$1:.$G$222];[.I85])" office:value-type="float" office:value="1" calcext:value-type="float">
            <text:p>1</text:p>
          </table:table-cell>
          <table:table-cell/>
          <table:table-cell office:value-type="float" office:value="63240149" calcext:value-type="float">
            <text:p>6324014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AND([.G85]=0;[.R85]&gt;0); &quot;:o&quot;; &quot;&quot;)">
            <text:p/>
          </table:table-cell>
          <table:table-cell office:value-type="float" office:value="84" calcext:value-type="float">
            <text:p>84</text:p>
          </table:table-cell>
          <table:table-cell table:formula="of:=COUNTIF([.$R$1:.$R$222];[.T85])" office:value-type="float" office:value="2" calcext:value-type="float">
            <text:p>2</text:p>
          </table:table-cell>
          <table:table-cell/>
          <table:table-cell table:formula="of:=SUM([.G85];[.R85])" office:value-type="float" office:value="127" calcext:value-type="float">
            <text:p>12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W$1:.W$222];[.Y8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66" calcext:value-type="float">
            <text:p>6325036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$G$1:.$G$222];[.I86])" office:value-type="float" office:value="0" calcext:value-type="float">
            <text:p>0</text:p>
          </table:table-cell>
          <table:table-cell/>
          <table:table-cell office:value-type="float" office:value="63250366" calcext:value-type="float">
            <text:p>63250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IF(AND([.G86]=0;[.R86]&gt;0); &quot;:o&quot;; &quot;&quot;)">
            <text:p/>
          </table:table-cell>
          <table:table-cell office:value-type="float" office:value="85" calcext:value-type="float">
            <text:p>85</text:p>
          </table:table-cell>
          <table:table-cell table:formula="of:=COUNTIF([.$R$1:.$R$222];[.T86])" office:value-type="float" office:value="2" calcext:value-type="float">
            <text:p>2</text:p>
          </table:table-cell>
          <table:table-cell/>
          <table:table-cell table:formula="of:=SUM([.G86];[.R86])" office:value-type="float" office:value="49" calcext:value-type="float">
            <text:p>4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W$1:.W$222];[.Y8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38" calcext:value-type="float">
            <text:p>632501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$G$1:.$G$222];[.I87])" office:value-type="float" office:value="1" calcext:value-type="float">
            <text:p>1</text:p>
          </table:table-cell>
          <table:table-cell/>
          <table:table-cell office:value-type="float" office:value="63250138" calcext:value-type="float">
            <text:p>632501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IF(AND([.G87]=0;[.R87]&gt;0); &quot;:o&quot;; &quot;&quot;)">
            <text:p/>
          </table:table-cell>
          <table:table-cell office:value-type="float" office:value="86" calcext:value-type="float">
            <text:p>86</text:p>
          </table:table-cell>
          <table:table-cell table:formula="of:=COUNTIF([.$R$1:.$R$222];[.T87])" office:value-type="float" office:value="0" calcext:value-type="float">
            <text:p>0</text:p>
          </table:table-cell>
          <table:table-cell/>
          <table:table-cell table:formula="of:=SUM([.G87];[.R87])" office:value-type="float" office:value="84" calcext:value-type="float">
            <text:p>8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W$1:.W$222];[.Y8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42" calcext:value-type="float">
            <text:p>632501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$G$1:.$G$222];[.I88])" office:value-type="float" office:value="0" calcext:value-type="float">
            <text:p>0</text:p>
          </table:table-cell>
          <table:table-cell/>
          <table:table-cell office:value-type="float" office:value="63250142" calcext:value-type="float">
            <text:p>632501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88]=0;[.R88]&gt;0); &quot;:o&quot;; &quot;&quot;)">
            <text:p/>
          </table:table-cell>
          <table:table-cell office:value-type="float" office:value="87" calcext:value-type="float">
            <text:p>87</text:p>
          </table:table-cell>
          <table:table-cell table:formula="of:=COUNTIF([.$R$1:.$R$222];[.T88])" office:value-type="float" office:value="2" calcext:value-type="float">
            <text:p>2</text:p>
          </table:table-cell>
          <table:table-cell/>
          <table:table-cell table:formula="of:=SUM([.G88];[.R88])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W$1:.W$222];[.Y8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45" calcext:value-type="float">
            <text:p>632501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$G$1:.$G$222];[.I89])" office:value-type="float" office:value="2" calcext:value-type="float">
            <text:p>2</text:p>
          </table:table-cell>
          <table:table-cell/>
          <table:table-cell office:value-type="float" office:value="63250145" calcext:value-type="float">
            <text:p>6325014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IF(AND([.G89]=0;[.R89]&gt;0); &quot;:o&quot;; &quot;&quot;)">
            <text:p/>
          </table:table-cell>
          <table:table-cell office:value-type="float" office:value="88" calcext:value-type="float">
            <text:p>88</text:p>
          </table:table-cell>
          <table:table-cell table:formula="of:=COUNTIF([.$R$1:.$R$222];[.T89])" office:value-type="float" office:value="0" calcext:value-type="float">
            <text:p>0</text:p>
          </table:table-cell>
          <table:table-cell/>
          <table:table-cell table:formula="of:=SUM([.G89];[.R89])" office:value-type="float" office:value="138" calcext:value-type="float">
            <text:p>13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W$1:.W$222];[.Y89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48" calcext:value-type="float">
            <text:p>6325014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$G$1:.$G$222];[.I90])" office:value-type="float" office:value="1" calcext:value-type="float">
            <text:p>1</text:p>
          </table:table-cell>
          <table:table-cell/>
          <table:table-cell office:value-type="float" office:value="63250148" calcext:value-type="float">
            <text:p>632501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AND([.G90]=0;[.R90]&gt;0); &quot;:o&quot;; &quot;&quot;)">
            <text:p/>
          </table:table-cell>
          <table:table-cell office:value-type="float" office:value="89" calcext:value-type="float">
            <text:p>89</text:p>
          </table:table-cell>
          <table:table-cell table:formula="of:=COUNTIF([.$R$1:.$R$222];[.T90])" office:value-type="float" office:value="2" calcext:value-type="float">
            <text:p>2</text:p>
          </table:table-cell>
          <table:table-cell/>
          <table:table-cell table:formula="of:=SUM([.G90];[.R90])" office:value-type="float" office:value="51" calcext:value-type="float">
            <text:p>5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W$1:.W$222];[.Y9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49" calcext:value-type="float">
            <text:p>6325014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$G$1:.$G$222];[.I91])" office:value-type="float" office:value="0" calcext:value-type="float">
            <text:p>0</text:p>
          </table:table-cell>
          <table:table-cell/>
          <table:table-cell office:value-type="float" office:value="63250149" calcext:value-type="float">
            <text:p>6325014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AND([.G91]=0;[.R91]&gt;0); &quot;:o&quot;; &quot;&quot;)">
            <text:p/>
          </table:table-cell>
          <table:table-cell office:value-type="float" office:value="90" calcext:value-type="float">
            <text:p>90</text:p>
          </table:table-cell>
          <table:table-cell table:formula="of:=COUNTIF([.$R$1:.$R$222];[.T91])" office:value-type="float" office:value="2" calcext:value-type="float">
            <text:p>2</text:p>
          </table:table-cell>
          <table:table-cell/>
          <table:table-cell table:formula="of:=SUM([.G91];[.R91])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W$1:.W$222];[.Y91])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50" calcext:value-type="float">
            <text:p>6325015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$G$1:.$G$222];[.I92])" office:value-type="float" office:value="0" calcext:value-type="float">
            <text:p>0</text:p>
          </table:table-cell>
          <table:table-cell/>
          <table:table-cell office:value-type="float" office:value="63250150" calcext:value-type="float">
            <text:p>632501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AND([.G92]=0;[.R92]&gt;0); &quot;:o&quot;; &quot;&quot;)">
            <text:p/>
          </table:table-cell>
          <table:table-cell office:value-type="float" office:value="91" calcext:value-type="float">
            <text:p>91</text:p>
          </table:table-cell>
          <table:table-cell table:formula="of:=COUNTIF([.$R$1:.$R$222];[.T92])" office:value-type="float" office:value="2" calcext:value-type="float">
            <text:p>2</text:p>
          </table:table-cell>
          <table:table-cell/>
          <table:table-cell table:formula="of:=SUM([.G92];[.R92])" office:value-type="float" office:value="54" calcext:value-type="float">
            <text:p>5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W$1:.W$222];[.Y92])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51" calcext:value-type="float">
            <text:p>6325015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$G$1:.$G$222];[.I93])" office:value-type="float" office:value="0" calcext:value-type="float">
            <text:p>0</text:p>
          </table:table-cell>
          <table:table-cell/>
          <table:table-cell office:value-type="float" office:value="63250151" calcext:value-type="float">
            <text:p>6325015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AND([.G93]=0;[.R93]&gt;0); &quot;:o&quot;; &quot;&quot;)">
            <text:p/>
          </table:table-cell>
          <table:table-cell office:value-type="float" office:value="92" calcext:value-type="float">
            <text:p>92</text:p>
          </table:table-cell>
          <table:table-cell table:formula="of:=COUNTIF([.$R$1:.$R$222];[.T93])" office:value-type="float" office:value="0" calcext:value-type="float">
            <text:p>0</text:p>
          </table:table-cell>
          <table:table-cell/>
          <table:table-cell table:formula="of:=SUM([.G93];[.R93])" office:value-type="float" office:value="81" calcext:value-type="float">
            <text:p>8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W$1:.W$222];[.Y9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53" calcext:value-type="float">
            <text:p>632501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$G$1:.$G$222];[.I94])" office:value-type="float" office:value="0" calcext:value-type="float">
            <text:p>0</text:p>
          </table:table-cell>
          <table:table-cell/>
          <table:table-cell office:value-type="float" office:value="63250153" calcext:value-type="float">
            <text:p>632501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94]=0;[.R94]&gt;0); &quot;:o&quot;; &quot;&quot;)">
            <text:p/>
          </table:table-cell>
          <table:table-cell office:value-type="float" office:value="93" calcext:value-type="float">
            <text:p>93</text:p>
          </table:table-cell>
          <table:table-cell table:formula="of:=COUNTIF([.$R$1:.$R$222];[.T94])" office:value-type="float" office:value="0" calcext:value-type="float">
            <text:p>0</text:p>
          </table:table-cell>
          <table:table-cell/>
          <table:table-cell table:formula="of:=SUM([.G94];[.R94])" office:value-type="float" office:value="33" calcext:value-type="float">
            <text:p>3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W$1:.W$222];[.Y94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49" calcext:value-type="float">
            <text:p>6325044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$G$1:.$G$222];[.I95])" office:value-type="float" office:value="0" calcext:value-type="float">
            <text:p>0</text:p>
          </table:table-cell>
          <table:table-cell/>
          <table:table-cell office:value-type="float" office:value="63250449" calcext:value-type="float">
            <text:p>6325044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95]=0;[.R95]&gt;0); &quot;:o&quot;; &quot;&quot;)">
            <text:p/>
          </table:table-cell>
          <table:table-cell office:value-type="float" office:value="94" calcext:value-type="float">
            <text:p>94</text:p>
          </table:table-cell>
          <table:table-cell table:formula="of:=COUNTIF([.$R$1:.$R$222];[.T95])" office:value-type="float" office:value="1" calcext:value-type="float">
            <text:p>1</text:p>
          </table:table-cell>
          <table:table-cell/>
          <table:table-cell table:formula="of:=SUM([.G95];[.R95])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W$1:.W$222];[.Y95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03" calcext:value-type="float">
            <text:p>6325040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$G$1:.$G$222];[.I96])" office:value-type="float" office:value="0" calcext:value-type="float">
            <text:p>0</text:p>
          </table:table-cell>
          <table:table-cell/>
          <table:table-cell office:value-type="float" office:value="63250403" calcext:value-type="float">
            <text:p>6325040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formula="of:=IF(AND([.G96]=0;[.R96]&gt;0); &quot;:o&quot;; &quot;&quot;)">
            <text:p/>
          </table:table-cell>
          <table:table-cell office:value-type="float" office:value="95" calcext:value-type="float">
            <text:p>95</text:p>
          </table:table-cell>
          <table:table-cell table:formula="of:=COUNTIF([.$R$1:.$R$222];[.T96])" office:value-type="float" office:value="0" calcext:value-type="float">
            <text:p>0</text:p>
          </table:table-cell>
          <table:table-cell/>
          <table:table-cell table:formula="of:=SUM([.G96];[.R96])" office:value-type="float" office:value="164" calcext:value-type="float">
            <text:p>16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W$1:.W$222];[.Y9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50" calcext:value-type="float">
            <text:p>632504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$G$1:.$G$222];[.I97])" office:value-type="float" office:value="0" calcext:value-type="float">
            <text:p>0</text:p>
          </table:table-cell>
          <table:table-cell/>
          <table:table-cell office:value-type="float" office:value="63250450" calcext:value-type="float">
            <text:p>6325045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97]=0;[.R97]&gt;0); &quot;:o&quot;; &quot;&quot;)">
            <text:p/>
          </table:table-cell>
          <table:table-cell office:value-type="float" office:value="96" calcext:value-type="float">
            <text:p>96</text:p>
          </table:table-cell>
          <table:table-cell table:formula="of:=COUNTIF([.$R$1:.$R$222];[.T97])" office:value-type="float" office:value="1" calcext:value-type="float">
            <text:p>1</text:p>
          </table:table-cell>
          <table:table-cell/>
          <table:table-cell table:formula="of:=SUM([.G97];[.R97])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W$1:.W$222];[.Y9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85" calcext:value-type="float">
            <text:p>6325048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$G$1:.$G$222];[.I98])" office:value-type="float" office:value="0" calcext:value-type="float">
            <text:p>0</text:p>
          </table:table-cell>
          <table:table-cell/>
          <table:table-cell office:value-type="float" office:value="63250485" calcext:value-type="float">
            <text:p>6325048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98]=0;[.R98]&gt;0); &quot;:o&quot;; &quot;&quot;)">
            <text:p/>
          </table:table-cell>
          <table:table-cell office:value-type="float" office:value="97" calcext:value-type="float">
            <text:p>97</text:p>
          </table:table-cell>
          <table:table-cell table:formula="of:=COUNTIF([.$R$1:.$R$222];[.T98])" office:value-type="float" office:value="0" calcext:value-type="float">
            <text:p>0</text:p>
          </table:table-cell>
          <table:table-cell/>
          <table:table-cell table:formula="of:=SUM([.G98];[.R98])" office:value-type="float" office:value="18" calcext:value-type="float">
            <text:p>1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W$1:.W$222];[.Y9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58" calcext:value-type="float">
            <text:p>632501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$G$1:.$G$222];[.I99])" office:value-type="float" office:value="0" calcext:value-type="float">
            <text:p>0</text:p>
          </table:table-cell>
          <table:table-cell/>
          <table:table-cell office:value-type="float" office:value="63250158" calcext:value-type="float">
            <text:p>6325015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IF(AND([.G99]=0;[.R99]&gt;0); &quot;:o&quot;; &quot;&quot;)">
            <text:p/>
          </table:table-cell>
          <table:table-cell office:value-type="float" office:value="98" calcext:value-type="float">
            <text:p>98</text:p>
          </table:table-cell>
          <table:table-cell table:formula="of:=COUNTIF([.$R$1:.$R$222];[.T99])" office:value-type="float" office:value="0" calcext:value-type="float">
            <text:p>0</text:p>
          </table:table-cell>
          <table:table-cell/>
          <table:table-cell table:formula="of:=SUM([.G99];[.R99])" office:value-type="float" office:value="115" calcext:value-type="float">
            <text:p>11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W$1:.W$222];[.Y9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59" calcext:value-type="float">
            <text:p>632501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$G$1:.$G$222];[.I100])" office:value-type="float" office:value="0" calcext:value-type="float">
            <text:p>0</text:p>
          </table:table-cell>
          <table:table-cell/>
          <table:table-cell office:value-type="float" office:value="63250159" calcext:value-type="float">
            <text:p>6325015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IF(AND([.G100]=0;[.R100]&gt;0); &quot;:o&quot;; &quot;&quot;)">
            <text:p/>
          </table:table-cell>
          <table:table-cell office:value-type="float" office:value="99" calcext:value-type="float">
            <text:p>99</text:p>
          </table:table-cell>
          <table:table-cell table:formula="of:=COUNTIF([.$R$1:.$R$222];[.T100])" office:value-type="float" office:value="0" calcext:value-type="float">
            <text:p>0</text:p>
          </table:table-cell>
          <table:table-cell/>
          <table:table-cell table:formula="of:=SUM([.G100];[.R100])" office:value-type="float" office:value="52" calcext:value-type="float">
            <text:p>5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W$1:.W$222];[.Y100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04" calcext:value-type="float">
            <text:p>632504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G$1:.$G$222];[.I101])" office:value-type="float" office:value="0" calcext:value-type="float">
            <text:p>0</text:p>
          </table:table-cell>
          <table:table-cell/>
          <table:table-cell office:value-type="float" office:value="63250404" calcext:value-type="float">
            <text:p>6325040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IF(AND([.G101]=0;[.R101]&gt;0); &quot;:o&quot;; &quot;&quot;)">
            <text:p/>
          </table:table-cell>
          <table:table-cell office:value-type="float" office:value="100" calcext:value-type="float">
            <text:p>100</text:p>
          </table:table-cell>
          <table:table-cell table:formula="of:=COUNTIF([.$R$1:.$R$222];[.T101])" office:value-type="float" office:value="1" calcext:value-type="float">
            <text:p>1</text:p>
          </table:table-cell>
          <table:table-cell/>
          <table:table-cell table:formula="of:=SUM([.G101];[.R101])" office:value-type="float" office:value="113" calcext:value-type="float">
            <text:p>1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W$1:.W$222];[.Y101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67" calcext:value-type="float">
            <text:p>6325016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$G$1:.$G$222];[.I102])" office:value-type="float" office:value="0" calcext:value-type="float">
            <text:p>0</text:p>
          </table:table-cell>
          <table:table-cell/>
          <table:table-cell office:value-type="float" office:value="63250167" calcext:value-type="float">
            <text:p>63250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02]=0;[.R102]&gt;0); &quot;:o&quot;; &quot;&quot;)">
            <text:p/>
          </table:table-cell>
          <table:table-cell office:value-type="float" office:value="101" calcext:value-type="float">
            <text:p>101</text:p>
          </table:table-cell>
          <table:table-cell table:formula="of:=COUNTIF([.$R$1:.$R$222];[.T102])" office:value-type="float" office:value="0" calcext:value-type="float">
            <text:p>0</text:p>
          </table:table-cell>
          <table:table-cell/>
          <table:table-cell table:formula="of:=SUM([.G102];[.R102])"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W$1:.W$222];[.Y10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73" calcext:value-type="float">
            <text:p>6325017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$G$1:.$G$222];[.I103])" office:value-type="float" office:value="0" calcext:value-type="float">
            <text:p>0</text:p>
          </table:table-cell>
          <table:table-cell/>
          <table:table-cell office:value-type="float" office:value="63250173" calcext:value-type="float">
            <text:p>632501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AND([.G103]=0;[.R103]&gt;0); &quot;:o&quot;; &quot;&quot;)">
            <text:p/>
          </table:table-cell>
          <table:table-cell office:value-type="float" office:value="102" calcext:value-type="float">
            <text:p>102</text:p>
          </table:table-cell>
          <table:table-cell table:formula="of:=COUNTIF([.$R$1:.$R$222];[.T103])" office:value-type="float" office:value="0" calcext:value-type="float">
            <text:p>0</text:p>
          </table:table-cell>
          <table:table-cell/>
          <table:table-cell table:formula="of:=SUM([.G103];[.R103])" office:value-type="float" office:value="44" calcext:value-type="float">
            <text:p>44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W$1:.W$222];[.Y10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74" calcext:value-type="float">
            <text:p>6325017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$G$1:.$G$222];[.I104])" office:value-type="float" office:value="0" calcext:value-type="float">
            <text:p>0</text:p>
          </table:table-cell>
          <table:table-cell/>
          <table:table-cell office:value-type="float" office:value="63250174" calcext:value-type="float">
            <text:p>6325017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F(AND([.G104]=0;[.R104]&gt;0); &quot;:o&quot;; &quot;&quot;)">
            <text:p/>
          </table:table-cell>
          <table:table-cell office:value-type="float" office:value="103" calcext:value-type="float">
            <text:p>103</text:p>
          </table:table-cell>
          <table:table-cell table:formula="of:=COUNTIF([.$R$1:.$R$222];[.T104])" office:value-type="float" office:value="1" calcext:value-type="float">
            <text:p>1</text:p>
          </table:table-cell>
          <table:table-cell/>
          <table:table-cell table:formula="of:=SUM([.G104];[.R104])" office:value-type="float" office:value="98" calcext:value-type="float">
            <text:p>9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W$1:.W$222];[.Y10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87" calcext:value-type="float">
            <text:p>6325048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$G$1:.$G$222];[.I105])" office:value-type="float" office:value="0" calcext:value-type="float">
            <text:p>0</text:p>
          </table:table-cell>
          <table:table-cell/>
          <table:table-cell office:value-type="float" office:value="63250487" calcext:value-type="float">
            <text:p>632504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05]=0;[.R105]&gt;0); &quot;:o&quot;; &quot;&quot;)">
            <text:p/>
          </table:table-cell>
          <table:table-cell office:value-type="float" office:value="104" calcext:value-type="float">
            <text:p>104</text:p>
          </table:table-cell>
          <table:table-cell table:formula="of:=COUNTIF([.$R$1:.$R$222];[.T105])" office:value-type="float" office:value="0" calcext:value-type="float">
            <text:p>0</text:p>
          </table:table-cell>
          <table:table-cell/>
          <table:table-cell table:formula="of:=SUM([.G105];[.R105])"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W$1:.W$222];[.Y10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77" calcext:value-type="float">
            <text:p>6325017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$G$1:.$G$222];[.I106])" office:value-type="float" office:value="0" calcext:value-type="float">
            <text:p>0</text:p>
          </table:table-cell>
          <table:table-cell/>
          <table:table-cell office:value-type="float" office:value="63250177" calcext:value-type="float">
            <text:p>6325017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AND([.G106]=0;[.R106]&gt;0); &quot;:o&quot;; &quot;&quot;)">
            <text:p/>
          </table:table-cell>
          <table:table-cell office:value-type="float" office:value="105" calcext:value-type="float">
            <text:p>105</text:p>
          </table:table-cell>
          <table:table-cell table:formula="of:=COUNTIF([.$R$1:.$R$222];[.T106])" office:value-type="float" office:value="0" calcext:value-type="float">
            <text:p>0</text:p>
          </table:table-cell>
          <table:table-cell/>
          <table:table-cell table:formula="of:=SUM([.G106];[.R106])" office:value-type="float" office:value="60" calcext:value-type="float">
            <text:p>6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W$1:.W$222];[.Y10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511" calcext:value-type="float">
            <text:p>6325051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$G$1:.$G$222];[.I107])" office:value-type="float" office:value="0" calcext:value-type="float">
            <text:p>0</text:p>
          </table:table-cell>
          <table:table-cell/>
          <table:table-cell office:value-type="float" office:value="63250511" calcext:value-type="float">
            <text:p>632505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07]=0;[.R107]&gt;0); &quot;:o&quot;; &quot;&quot;)">
            <text:p/>
          </table:table-cell>
          <table:table-cell office:value-type="float" office:value="106" calcext:value-type="float">
            <text:p>106</text:p>
          </table:table-cell>
          <table:table-cell table:formula="of:=COUNTIF([.$R$1:.$R$222];[.T107])" office:value-type="float" office:value="0" calcext:value-type="float">
            <text:p>0</text:p>
          </table:table-cell>
          <table:table-cell/>
          <table:table-cell table:formula="of:=SUM([.G107];[.R107])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W$1:.W$222];[.Y10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79" calcext:value-type="float">
            <text:p>6325017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$G$1:.$G$222];[.I108])" office:value-type="float" office:value="0" calcext:value-type="float">
            <text:p>0</text:p>
          </table:table-cell>
          <table:table-cell/>
          <table:table-cell office:value-type="float" office:value="63250179" calcext:value-type="float">
            <text:p>632501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08]=0;[.R108]&gt;0); &quot;:o&quot;; &quot;&quot;)">
            <text:p/>
          </table:table-cell>
          <table:table-cell office:value-type="float" office:value="107" calcext:value-type="float">
            <text:p>107</text:p>
          </table:table-cell>
          <table:table-cell table:formula="of:=COUNTIF([.$R$1:.$R$222];[.T108])" office:value-type="float" office:value="0" calcext:value-type="float">
            <text:p>0</text:p>
          </table:table-cell>
          <table:table-cell/>
          <table:table-cell table:formula="of:=SUM([.G108];[.R108]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W$1:.W$222];[.Y10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05" calcext:value-type="float">
            <text:p>6325040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$G$1:.$G$222];[.I109])" office:value-type="float" office:value="2" calcext:value-type="float">
            <text:p>2</text:p>
          </table:table-cell>
          <table:table-cell/>
          <table:table-cell office:value-type="float" office:value="63250405" calcext:value-type="float">
            <text:p>6325040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09]=0;[.R109]&gt;0); &quot;:o&quot;; &quot;&quot;)">
            <text:p/>
          </table:table-cell>
          <table:table-cell office:value-type="float" office:value="108" calcext:value-type="float">
            <text:p>108</text:p>
          </table:table-cell>
          <table:table-cell table:formula="of:=COUNTIF([.$R$1:.$R$222];[.T109])" office:value-type="float" office:value="0" calcext:value-type="float">
            <text:p>0</text:p>
          </table:table-cell>
          <table:table-cell/>
          <table:table-cell table:formula="of:=SUM([.G109];[.R109])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W$1:.W$222];[.Y10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82" calcext:value-type="float">
            <text:p>6325018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$G$1:.$G$222];[.I110])" office:value-type="float" office:value="0" calcext:value-type="float">
            <text:p>0</text:p>
          </table:table-cell>
          <table:table-cell/>
          <table:table-cell office:value-type="float" office:value="63250182" calcext:value-type="float">
            <text:p>6325018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0]=0;[.R110]&gt;0); &quot;:o&quot;; &quot;&quot;)">
            <text:p/>
          </table:table-cell>
          <table:table-cell office:value-type="float" office:value="109" calcext:value-type="float">
            <text:p>109</text:p>
          </table:table-cell>
          <table:table-cell table:formula="of:=COUNTIF([.$R$1:.$R$222];[.T110])" office:value-type="float" office:value="0" calcext:value-type="float">
            <text:p>0</text:p>
          </table:table-cell>
          <table:table-cell/>
          <table:table-cell table:formula="of:=SUM([.G110];[.R110])" office:value-type="float" office:value="37" calcext:value-type="float">
            <text:p>37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W$1:.W$222];[.Y110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07" calcext:value-type="float">
            <text:p>6325040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$G$1:.$G$222];[.I111])" office:value-type="float" office:value="0" calcext:value-type="float">
            <text:p>0</text:p>
          </table:table-cell>
          <table:table-cell/>
          <table:table-cell office:value-type="float" office:value="63250407" calcext:value-type="float">
            <text:p>6325040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1]=0;[.R111]&gt;0); &quot;:o&quot;; &quot;&quot;)">
            <text:p/>
          </table:table-cell>
          <table:table-cell office:value-type="float" office:value="110" calcext:value-type="float">
            <text:p>110</text:p>
          </table:table-cell>
          <table:table-cell table:formula="of:=COUNTIF([.$R$1:.$R$222];[.T111])" office:value-type="float" office:value="0" calcext:value-type="float">
            <text:p>0</text:p>
          </table:table-cell>
          <table:table-cell/>
          <table:table-cell table:formula="of:=SUM([.G111];[.R111])" office:value-type="float" office:value="25" calcext:value-type="float">
            <text:p>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W$1:.W$222];[.Y111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85" calcext:value-type="float">
            <text:p>632501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$G$1:.$G$222];[.I112])" office:value-type="float" office:value="0" calcext:value-type="float">
            <text:p>0</text:p>
          </table:table-cell>
          <table:table-cell/>
          <table:table-cell office:value-type="float" office:value="63250185" calcext:value-type="float">
            <text:p>6325018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2]=0;[.R112]&gt;0); &quot;:o&quot;; &quot;&quot;)">
            <text:p/>
          </table:table-cell>
          <table:table-cell office:value-type="float" office:value="111" calcext:value-type="float">
            <text:p>111</text:p>
          </table:table-cell>
          <table:table-cell table:formula="of:=COUNTIF([.$R$1:.$R$222];[.T112])" office:value-type="float" office:value="1" calcext:value-type="float">
            <text:p>1</text:p>
          </table:table-cell>
          <table:table-cell/>
          <table:table-cell table:formula="of:=SUM([.G112];[.R112])" office:value-type="float" office:value="30" calcext:value-type="float">
            <text:p>3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W$1:.W$222];[.Y11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86" calcext:value-type="float">
            <text:p>632501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$G$1:.$G$222];[.I113])" office:value-type="float" office:value="0" calcext:value-type="float">
            <text:p>0</text:p>
          </table:table-cell>
          <table:table-cell/>
          <table:table-cell office:value-type="float" office:value="63250186" calcext:value-type="float">
            <text:p>6325018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AND([.G113]=0;[.R113]&gt;0); &quot;:o&quot;; &quot;&quot;)">
            <text:p/>
          </table:table-cell>
          <table:table-cell office:value-type="float" office:value="112" calcext:value-type="float">
            <text:p>112</text:p>
          </table:table-cell>
          <table:table-cell table:formula="of:=COUNTIF([.$R$1:.$R$222];[.T113])" office:value-type="float" office:value="1" calcext:value-type="float">
            <text:p>1</text:p>
          </table:table-cell>
          <table:table-cell/>
          <table:table-cell table:formula="of:=SUM([.G113];[.R113])" office:value-type="float" office:value="56" calcext:value-type="float">
            <text:p>56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W$1:.W$222];[.Y11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89" calcext:value-type="float">
            <text:p>632501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$G$1:.$G$222];[.I114])" office:value-type="float" office:value="0" calcext:value-type="float">
            <text:p>0</text:p>
          </table:table-cell>
          <table:table-cell/>
          <table:table-cell office:value-type="float" office:value="63250189" calcext:value-type="float">
            <text:p>6325018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AND([.G114]=0;[.R114]&gt;0); &quot;:o&quot;; &quot;&quot;)">
            <text:p/>
          </table:table-cell>
          <table:table-cell office:value-type="float" office:value="113" calcext:value-type="float">
            <text:p>113</text:p>
          </table:table-cell>
          <table:table-cell table:formula="of:=COUNTIF([.$R$1:.$R$222];[.T114])" office:value-type="float" office:value="1" calcext:value-type="float">
            <text:p>1</text:p>
          </table:table-cell>
          <table:table-cell/>
          <table:table-cell table:formula="of:=SUM([.G114];[.R114])" office:value-type="float" office:value="43" calcext:value-type="float">
            <text:p>4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W$1:.W$222];[.Y114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97" calcext:value-type="float">
            <text:p>6325019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$G$1:.$G$222];[.I115])" office:value-type="float" office:value="0" calcext:value-type="float">
            <text:p>0</text:p>
          </table:table-cell>
          <table:table-cell/>
          <table:table-cell office:value-type="float" office:value="63250197" calcext:value-type="float">
            <text:p>6325019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5]=0;[.R115]&gt;0); &quot;:o&quot;; &quot;&quot;)">
            <text:p/>
          </table:table-cell>
          <table:table-cell office:value-type="float" office:value="114" calcext:value-type="float">
            <text:p>114</text:p>
          </table:table-cell>
          <table:table-cell table:formula="of:=COUNTIF([.$R$1:.$R$222];[.T115])" office:value-type="float" office:value="0" calcext:value-type="float">
            <text:p>0</text:p>
          </table:table-cell>
          <table:table-cell/>
          <table:table-cell table:formula="of:=SUM([.G115];[.R115])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W$1:.W$222];[.Y11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98" calcext:value-type="float">
            <text:p>6325019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$G$1:.$G$222];[.I116])" office:value-type="float" office:value="0" calcext:value-type="float">
            <text:p>0</text:p>
          </table:table-cell>
          <table:table-cell/>
          <table:table-cell office:value-type="float" office:value="63250198" calcext:value-type="float">
            <text:p>63250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6]=0;[.R116]&gt;0); &quot;:o&quot;; &quot;&quot;)">
            <text:p/>
          </table:table-cell>
          <table:table-cell office:value-type="float" office:value="115" calcext:value-type="float">
            <text:p>115</text:p>
          </table:table-cell>
          <table:table-cell table:formula="of:=COUNTIF([.$R$1:.$R$222];[.T116])" office:value-type="float" office:value="0" calcext:value-type="float">
            <text:p>0</text:p>
          </table:table-cell>
          <table:table-cell/>
          <table:table-cell table:formula="of:=SUM([.G116];[.R116])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W$1:.W$222];[.Y116])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199" calcext:value-type="float">
            <text:p>6325019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$G$1:.$G$222];[.I117])" office:value-type="float" office:value="0" calcext:value-type="float">
            <text:p>0</text:p>
          </table:table-cell>
          <table:table-cell/>
          <table:table-cell office:value-type="float" office:value="63250199" calcext:value-type="float">
            <text:p>632501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7]=0;[.R117]&gt;0); &quot;:o&quot;; &quot;&quot;)">
            <text:p/>
          </table:table-cell>
          <table:table-cell office:value-type="float" office:value="116" calcext:value-type="float">
            <text:p>116</text:p>
          </table:table-cell>
          <table:table-cell table:formula="of:=COUNTIF([.$R$1:.$R$222];[.T117])" office:value-type="float" office:value="0" calcext:value-type="float">
            <text:p>0</text:p>
          </table:table-cell>
          <table:table-cell/>
          <table:table-cell table:formula="of:=SUM([.G117];[.R117])" office:value-type="float" office:value="24" calcext:value-type="float">
            <text:p>2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W$1:.W$222];[.Y11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01" calcext:value-type="float">
            <text:p>632502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$G$1:.$G$222];[.I118])" office:value-type="float" office:value="0" calcext:value-type="float">
            <text:p>0</text:p>
          </table:table-cell>
          <table:table-cell/>
          <table:table-cell office:value-type="float" office:value="63250201" calcext:value-type="float">
            <text:p>632502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AND([.G118]=0;[.R118]&gt;0); &quot;:o&quot;; &quot;&quot;)">
            <text:p/>
          </table:table-cell>
          <table:table-cell office:value-type="float" office:value="117" calcext:value-type="float">
            <text:p>117</text:p>
          </table:table-cell>
          <table:table-cell table:formula="of:=COUNTIF([.$R$1:.$R$222];[.T118])" office:value-type="float" office:value="0" calcext:value-type="float">
            <text:p>0</text:p>
          </table:table-cell>
          <table:table-cell/>
          <table:table-cell table:formula="of:=SUM([.G118];[.R118])" office:value-type="float" office:value="63" calcext:value-type="float">
            <text:p>63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W$1:.W$222];[.Y118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02" calcext:value-type="float">
            <text:p>6325020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$G$1:.$G$222];[.I119])" office:value-type="float" office:value="0" calcext:value-type="float">
            <text:p>0</text:p>
          </table:table-cell>
          <table:table-cell/>
          <table:table-cell office:value-type="float" office:value="63250202" calcext:value-type="float">
            <text:p>6325020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19]=0;[.R119]&gt;0); &quot;:o&quot;; &quot;&quot;)">
            <text:p/>
          </table:table-cell>
          <table:table-cell office:value-type="float" office:value="118" calcext:value-type="float">
            <text:p>118</text:p>
          </table:table-cell>
          <table:table-cell table:formula="of:=COUNTIF([.$R$1:.$R$222];[.T119])" office:value-type="float" office:value="0" calcext:value-type="float">
            <text:p>0</text:p>
          </table:table-cell>
          <table:table-cell/>
          <table:table-cell table:formula="of:=SUM([.G119];[.R119])" office:value-type="float" office:value="23" calcext:value-type="float">
            <text:p>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W$1:.W$222];[.Y11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12" calcext:value-type="float">
            <text:p>632504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$G$1:.$G$222];[.I120])" office:value-type="float" office:value="0" calcext:value-type="float">
            <text:p>0</text:p>
          </table:table-cell>
          <table:table-cell/>
          <table:table-cell office:value-type="float" office:value="63250412" calcext:value-type="float">
            <text:p>632504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IF(AND([.G120]=0;[.R120]&gt;0); &quot;:o&quot;; &quot;&quot;)">
            <text:p/>
          </table:table-cell>
          <table:table-cell office:value-type="float" office:value="119" calcext:value-type="float">
            <text:p>119</text:p>
          </table:table-cell>
          <table:table-cell table:formula="of:=COUNTIF([.$R$1:.$R$222];[.T120])" office:value-type="float" office:value="1" calcext:value-type="float">
            <text:p>1</text:p>
          </table:table-cell>
          <table:table-cell/>
          <table:table-cell table:formula="of:=SUM([.G120];[.R120])" office:value-type="float" office:value="100" calcext:value-type="float">
            <text:p>10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W$1:.W$222];[.Y120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79" calcext:value-type="float">
            <text:p>6325037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$G$1:.$G$222];[.I121])" office:value-type="float" office:value="0" calcext:value-type="float">
            <text:p>0</text:p>
          </table:table-cell>
          <table:table-cell/>
          <table:table-cell office:value-type="float" office:value="63250379" calcext:value-type="float">
            <text:p>6325037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IF(AND([.G121]=0;[.R121]&gt;0); &quot;:o&quot;; &quot;&quot;)">
            <text:p/>
          </table:table-cell>
          <table:table-cell office:value-type="float" office:value="120" calcext:value-type="float">
            <text:p>120</text:p>
          </table:table-cell>
          <table:table-cell table:formula="of:=COUNTIF([.$R$1:.$R$222];[.T121])" office:value-type="float" office:value="0" calcext:value-type="float">
            <text:p>0</text:p>
          </table:table-cell>
          <table:table-cell/>
          <table:table-cell table:formula="of:=SUM([.G121];[.R121])"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W$1:.W$222];[.Y121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08" calcext:value-type="float">
            <text:p>6325020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$G$1:.$G$222];[.I122])" office:value-type="float" office:value="0" calcext:value-type="float">
            <text:p>0</text:p>
          </table:table-cell>
          <table:table-cell/>
          <table:table-cell office:value-type="float" office:value="63250208" calcext:value-type="float">
            <text:p>6325020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22]=0;[.R122]&gt;0); &quot;:o&quot;; &quot;&quot;)">
            <text:p/>
          </table:table-cell>
          <table:table-cell office:value-type="float" office:value="121" calcext:value-type="float">
            <text:p>121</text:p>
          </table:table-cell>
          <table:table-cell table:formula="of:=COUNTIF([.$R$1:.$R$222];[.T122])" office:value-type="float" office:value="0" calcext:value-type="float">
            <text:p>0</text:p>
          </table:table-cell>
          <table:table-cell/>
          <table:table-cell table:formula="of:=SUM([.G122];[.R122]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W$1:.W$222];[.Y12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18" calcext:value-type="float">
            <text:p>6324021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$G$1:.$G$222];[.I123])" office:value-type="float" office:value="0" calcext:value-type="float">
            <text:p>0</text:p>
          </table:table-cell>
          <table:table-cell/>
          <table:table-cell office:value-type="float" office:value="63240218" calcext:value-type="float">
            <text:p>632402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23]=0;[.R123]&gt;0); &quot;:o&quot;; &quot;&quot;)">
            <text:p/>
          </table:table-cell>
          <table:table-cell office:value-type="float" office:value="122" calcext:value-type="float">
            <text:p>122</text:p>
          </table:table-cell>
          <table:table-cell table:formula="of:=COUNTIF([.$R$1:.$R$222];[.T123])" office:value-type="float" office:value="0" calcext:value-type="float">
            <text:p>0</text:p>
          </table:table-cell>
          <table:table-cell/>
          <table:table-cell table:formula="of:=SUM([.G123];[.R123])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W$1:.W$222];[.Y12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13" calcext:value-type="float">
            <text:p>632504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$G$1:.$G$222];[.I124])" office:value-type="float" office:value="0" calcext:value-type="float">
            <text:p>0</text:p>
          </table:table-cell>
          <table:table-cell/>
          <table:table-cell office:value-type="float" office:value="63250413" calcext:value-type="float">
            <text:p>632504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IF(AND([.G124]=0;[.R124]&gt;0); &quot;:o&quot;; &quot;&quot;)">
            <text:p/>
          </table:table-cell>
          <table:table-cell office:value-type="float" office:value="123" calcext:value-type="float">
            <text:p>123</text:p>
          </table:table-cell>
          <table:table-cell table:formula="of:=COUNTIF([.$R$1:.$R$222];[.T124])" office:value-type="float" office:value="0" calcext:value-type="float">
            <text:p>0</text:p>
          </table:table-cell>
          <table:table-cell/>
          <table:table-cell table:formula="of:=SUM([.G124];[.R124])" office:value-type="float" office:value="90" calcext:value-type="float">
            <text:p>9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W$1:.W$222];[.Y12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1" calcext:value-type="float">
            <text:p>632502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$G$1:.$G$222];[.I125])" office:value-type="float" office:value="0" calcext:value-type="float">
            <text:p>0</text:p>
          </table:table-cell>
          <table:table-cell/>
          <table:table-cell office:value-type="float" office:value="63250211" calcext:value-type="float">
            <text:p>632502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25]=0;[.R125]&gt;0); &quot;:o&quot;; &quot;&quot;)">
            <text:p/>
          </table:table-cell>
          <table:table-cell office:value-type="float" office:value="124" calcext:value-type="float">
            <text:p>124</text:p>
          </table:table-cell>
          <table:table-cell table:formula="of:=COUNTIF([.$R$1:.$R$222];[.T125])" office:value-type="float" office:value="0" calcext:value-type="float">
            <text:p>0</text:p>
          </table:table-cell>
          <table:table-cell/>
          <table:table-cell table:formula="of:=SUM([.G125];[.R125])" office:value-type="float" office:value="5" calcext:value-type="float">
            <text:p>5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W$1:.W$222];[.Y125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14" calcext:value-type="float">
            <text:p>632504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$G$1:.$G$222];[.I126])" office:value-type="float" office:value="0" calcext:value-type="float">
            <text:p>0</text:p>
          </table:table-cell>
          <table:table-cell/>
          <table:table-cell office:value-type="float" office:value="63250414" calcext:value-type="float">
            <text:p>632504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IF(AND([.G126]=0;[.R126]&gt;0); &quot;:o&quot;; &quot;&quot;)">
            <text:p/>
          </table:table-cell>
          <table:table-cell office:value-type="float" office:value="125" calcext:value-type="float">
            <text:p>125</text:p>
          </table:table-cell>
          <table:table-cell table:formula="of:=COUNTIF([.$R$1:.$R$222];[.T126])" office:value-type="float" office:value="0" calcext:value-type="float">
            <text:p>0</text:p>
          </table:table-cell>
          <table:table-cell/>
          <table:table-cell table:formula="of:=SUM([.G126];[.R126])" office:value-type="float" office:value="62" calcext:value-type="float">
            <text:p>6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W$1:.W$222];[.Y126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20" calcext:value-type="float">
            <text:p>632402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SUM([.J1:.J126])" office:value-type="float" office:value="222" calcext:value-type="float">
            <text:p>222</text:p>
          </table:table-cell>
          <table:table-cell/>
          <table:table-cell office:value-type="float" office:value="63240220" calcext:value-type="float">
            <text:p>632402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IF(AND([.G127]=0;[.R127]&gt;0); &quot;:o&quot;; &quot;&quot;)">
            <text:p/>
          </table:table-cell>
          <table:table-cell/>
          <table:table-cell table:formula="of:=SUM([.U1:.U126])" office:value-type="float" office:value="222" calcext:value-type="float">
            <text:p>222</text:p>
          </table:table-cell>
          <table:table-cell/>
          <table:table-cell table:formula="of:=SUM([.G127];[.R127])" office:value-type="float" office:value="99" calcext:value-type="float">
            <text:p>99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W$1:.W$222];[.Y12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2" calcext:value-type="float">
            <text:p>632502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63250212" calcext:value-type="float">
            <text:p>632502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28]=0;[.R128]&gt;0); &quot;:o&quot;; &quot;&quot;)">
            <text:p/>
          </table:table-cell>
          <table:table-cell table:number-columns-repeated="3"/>
          <table:table-cell table:formula="of:=SUM([.G128];[.R128])" office:value-type="float" office:value="11" calcext:value-type="float">
            <text:p>1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W$1:.W$222];[.Y12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15" calcext:value-type="float">
            <text:p>632504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63250415" calcext:value-type="float">
            <text:p>63250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AND([.G129]=0;[.R129]&gt;0); &quot;:o&quot;; &quot;&quot;)">
            <text:p/>
          </table:table-cell>
          <table:table-cell table:number-columns-repeated="3"/>
          <table:table-cell table:formula="of:=SUM([.G129];[.R129])" office:value-type="float" office:value="35" calcext:value-type="float">
            <text:p>3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W$1:.W$222];[.Y1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3" calcext:value-type="float">
            <text:p>632502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13" calcext:value-type="float">
            <text:p>63250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0]=0;[.R130]&gt;0); &quot;:o&quot;; &quot;&quot;)">
            <text:p/>
          </table:table-cell>
          <table:table-cell table:number-columns-repeated="3"/>
          <table:table-cell table:formula="of:=SUM([.G130];[.R130])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W$1:.W$222];[.Y13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4" calcext:value-type="float">
            <text:p>632502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63250214" calcext:value-type="float">
            <text:p>632502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AND([.G131]=0;[.R131]&gt;0); &quot;:o&quot;; &quot;&quot;)">
            <text:p/>
          </table:table-cell>
          <table:table-cell table:number-columns-repeated="3"/>
          <table:table-cell table:formula="of:=SUM([.G131];[.R131])" office:value-type="float" office:value="133" calcext:value-type="float">
            <text:p>13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W$1:.W$222];[.Y13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24" calcext:value-type="float">
            <text:p>63240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3240224" calcext:value-type="float">
            <text:p>632402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IF(AND([.G132]=0;[.R132]&gt;0); &quot;:o&quot;; &quot;&quot;)">
            <text:p/>
          </table:table-cell>
          <table:table-cell table:number-columns-repeated="3"/>
          <table:table-cell table:formula="of:=SUM([.G132];[.R132])" office:value-type="float" office:value="119" calcext:value-type="float">
            <text:p>119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W$1:.W$222];[.Y132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5" calcext:value-type="float">
            <text:p>632502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3250215" calcext:value-type="float">
            <text:p>632502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3]=0;[.R133]&gt;0); &quot;:o&quot;; &quot;&quot;)">
            <text:p/>
          </table:table-cell>
          <table:table-cell table:number-columns-repeated="3"/>
          <table:table-cell table:formula="of:=SUM([.G133];[.R133])" office:value-type="float" office:value="8" calcext:value-type="float">
            <text:p>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W$1:.W$222];[.Y133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16" calcext:value-type="float">
            <text:p>632502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3250216" calcext:value-type="float">
            <text:p>632502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IF(AND([.G134]=0;[.R134]&gt;0); &quot;:o&quot;; &quot;&quot;)">
            <text:p/>
          </table:table-cell>
          <table:table-cell table:number-columns-repeated="3"/>
          <table:table-cell table:formula="of:=SUM([.G134];[.R134])" office:value-type="float" office:value="103" calcext:value-type="float">
            <text:p>103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W$1:.W$222];[.Y134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22" calcext:value-type="float">
            <text:p>632502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3250222" calcext:value-type="float">
            <text:p>632502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5]=0;[.R135]&gt;0); &quot;:o&quot;; &quot;&quot;)">
            <text:p/>
          </table:table-cell>
          <table:table-cell table:number-columns-repeated="3"/>
          <table:table-cell table:formula="of:=SUM([.G135];[.R135])"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W$1:.W$222];[.Y13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23" calcext:value-type="float">
            <text:p>6325022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63250223" calcext:value-type="float">
            <text:p>632502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6]=0;[.R136]&gt;0); &quot;:o&quot;; &quot;&quot;)">
            <text:p/>
          </table:table-cell>
          <table:table-cell table:number-columns-repeated="3"/>
          <table:table-cell table:formula="of:=SUM([.G136];[.R136])" office:value-type="float" office:value="42" calcext:value-type="float">
            <text:p>4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W$1:.W$222];[.Y13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25" calcext:value-type="float">
            <text:p>632502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63250225" calcext:value-type="float">
            <text:p>63250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37]=0;[.R137]&gt;0); &quot;:o&quot;; &quot;&quot;)">
            <text:p/>
          </table:table-cell>
          <table:table-cell table:number-columns-repeated="3"/>
          <table:table-cell table:formula="of:=SUM([.G137];[.R137])" office:value-type="float" office:value="22" calcext:value-type="float">
            <text:p>22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W$1:.W$222];[.Y137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18" calcext:value-type="float">
            <text:p>632504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3250418" calcext:value-type="float">
            <text:p>632504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IF(AND([.G138]=0;[.R138]&gt;0); &quot;:o&quot;; &quot;&quot;)">
            <text:p/>
          </table:table-cell>
          <table:table-cell table:number-columns-repeated="3"/>
          <table:table-cell table:formula="of:=SUM([.G138];[.R138])" office:value-type="float" office:value="79" calcext:value-type="float">
            <text:p>7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W$1:.W$222];[.Y13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27" calcext:value-type="float">
            <text:p>632502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63250227" calcext:value-type="float">
            <text:p>632502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IF(AND([.G139]=0;[.R139]&gt;0); &quot;:o&quot;; &quot;&quot;)">
            <text:p/>
          </table:table-cell>
          <table:table-cell table:number-columns-repeated="3"/>
          <table:table-cell table:formula="of:=SUM([.G139];[.R139])" office:value-type="float" office:value="113" calcext:value-type="float">
            <text:p>113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W$1:.W$222];[.Y139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29" calcext:value-type="float">
            <text:p>632502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63250229" calcext:value-type="float">
            <text:p>6325022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formula="of:=IF(AND([.G140]=0;[.R140]&gt;0); &quot;:o&quot;; &quot;&quot;)">
            <text:p/>
          </table:table-cell>
          <table:table-cell table:number-columns-repeated="3"/>
          <table:table-cell table:formula="of:=SUM([.G140];[.R140])" office:value-type="float" office:value="184" calcext:value-type="float">
            <text:p>184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W$1:.W$222];[.Y14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30" calcext:value-type="float">
            <text:p>632502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63250230" calcext:value-type="float">
            <text:p>632502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AND([.G141]=0;[.R141]&gt;0); &quot;:o&quot;; &quot;&quot;)">
            <text:p/>
          </table:table-cell>
          <table:table-cell table:number-columns-repeated="3"/>
          <table:table-cell table:formula="of:=SUM([.G141];[.R141])" office:value-type="float" office:value="141" calcext:value-type="float">
            <text:p>14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W$1:.W$222];[.Y1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90" calcext:value-type="float">
            <text:p>632504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490" calcext:value-type="float">
            <text:p>6325049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42]=0;[.R142]&gt;0); &quot;:o&quot;; &quot;&quot;)">
            <text:p/>
          </table:table-cell>
          <table:table-cell table:number-columns-repeated="3"/>
          <table:table-cell table:formula="of:=SUM([.G142];[.R142])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W$1:.W$222];[.Y14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30238" calcext:value-type="float">
            <text:p>632302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30238" calcext:value-type="float">
            <text:p>6323023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43]=0;[.R143]&gt;0); &quot;:o&quot;; &quot;&quot;)">
            <text:p/>
          </table:table-cell>
          <table:table-cell table:number-columns-repeated="3"/>
          <table:table-cell table:formula="of:=SUM([.G143];[.R143])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W$1:.W$222];[.Y14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32" calcext:value-type="float">
            <text:p>632502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63250232" calcext:value-type="float">
            <text:p>6325023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AND([.G144]=0;[.R144]&gt;0); &quot;:o&quot;; &quot;&quot;)">
            <text:p/>
          </table:table-cell>
          <table:table-cell table:number-columns-repeated="3"/>
          <table:table-cell table:formula="of:=SUM([.G144];[.R144])" office:value-type="float" office:value="73" calcext:value-type="float">
            <text:p>73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W$1:.W$222];[.Y14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33" calcext:value-type="float">
            <text:p>6325023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63250233" calcext:value-type="float">
            <text:p>632502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45]=0;[.R145]&gt;0); &quot;:o&quot;; &quot;&quot;)">
            <text:p/>
          </table:table-cell>
          <table:table-cell table:number-columns-repeated="3"/>
          <table:table-cell table:formula="of:=SUM([.G145];[.R145])" office:value-type="float" office:value="22" calcext:value-type="float">
            <text:p>22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W$1:.W$222];[.Y14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20246" calcext:value-type="float">
            <text:p>632202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3220246" calcext:value-type="float">
            <text:p>6322024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46]=0;[.R146]&gt;0); &quot;:o&quot;; &quot;&quot;)">
            <text:p/>
          </table:table-cell>
          <table:table-cell table:number-columns-repeated="3"/>
          <table:table-cell table:formula="of:=SUM([.G146];[.R146])" office:value-type="float" office:value="27" calcext:value-type="float">
            <text:p>27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W$1:.W$222];[.Y14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36" calcext:value-type="float">
            <text:p>6324023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63240236" calcext:value-type="float">
            <text:p>632402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AND([.G147]=0;[.R147]&gt;0); &quot;:o&quot;; &quot;&quot;)">
            <text:p/>
          </table:table-cell>
          <table:table-cell table:number-columns-repeated="3"/>
          <table:table-cell table:formula="of:=SUM([.G147];[.R147])" office:value-type="float" office:value="67" calcext:value-type="float">
            <text:p>6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W$1:.W$222];[.Y147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37" calcext:value-type="float">
            <text:p>632402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40237" calcext:value-type="float">
            <text:p>632402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48]=0;[.R148]&gt;0); &quot;:o&quot;; &quot;&quot;)">
            <text:p/>
          </table:table-cell>
          <table:table-cell table:number-columns-repeated="3"/>
          <table:table-cell table:formula="of:=SUM([.G148];[.R148])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W$1:.W$222];[.Y14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23" calcext:value-type="float">
            <text:p>632504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3250423" calcext:value-type="float">
            <text:p>632504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formula="of:=IF(AND([.G149]=0;[.R149]&gt;0); &quot;:o&quot;; &quot;&quot;)">
            <text:p/>
          </table:table-cell>
          <table:table-cell table:number-columns-repeated="3"/>
          <table:table-cell table:formula="of:=SUM([.G149];[.R149])" office:value-type="float" office:value="115" calcext:value-type="float">
            <text:p>115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W$1:.W$222];[.Y14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37" calcext:value-type="float">
            <text:p>6325023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63250237" calcext:value-type="float">
            <text:p>632502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AND([.G150]=0;[.R150]&gt;0); &quot;:o&quot;; &quot;&quot;)">
            <text:p/>
          </table:table-cell>
          <table:table-cell table:number-columns-repeated="3"/>
          <table:table-cell table:formula="of:=SUM([.G150];[.R150])" office:value-type="float" office:value="74" calcext:value-type="float">
            <text:p>74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W$1:.W$222];[.Y15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39" calcext:value-type="float">
            <text:p>632502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3250239" calcext:value-type="float">
            <text:p>632502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AND([.G151]=0;[.R151]&gt;0); &quot;:o&quot;; &quot;&quot;)">
            <text:p/>
          </table:table-cell>
          <table:table-cell table:number-columns-repeated="3"/>
          <table:table-cell table:formula="of:=SUM([.G151];[.R151])" office:value-type="float" office:value="31" calcext:value-type="float">
            <text:p>3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W$1:.W$222];[.Y15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0" calcext:value-type="float">
            <text:p>632502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63250240" calcext:value-type="float">
            <text:p>6325024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IF(AND([.G152]=0;[.R152]&gt;0); &quot;:o&quot;; &quot;&quot;)">
            <text:p/>
          </table:table-cell>
          <table:table-cell table:number-columns-repeated="3"/>
          <table:table-cell table:formula="of:=SUM([.G152];[.R152])" office:value-type="float" office:value="138" calcext:value-type="float">
            <text:p>138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W$1:.W$222];[.Y15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1" calcext:value-type="float">
            <text:p>632502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3250241" calcext:value-type="float">
            <text:p>632502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53]=0;[.R153]&gt;0); &quot;:o&quot;; &quot;&quot;)">
            <text:p/>
          </table:table-cell>
          <table:table-cell table:number-columns-repeated="3"/>
          <table:table-cell table:formula="of:=SUM([.G153];[.R153])" office:value-type="float" office:value="17" calcext:value-type="float">
            <text:p>17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W$1:.W$222];[.Y15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2" calcext:value-type="float">
            <text:p>632502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63250242" calcext:value-type="float">
            <text:p>632502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IF(AND([.G154]=0;[.R154]&gt;0); &quot;:o&quot;; &quot;&quot;)">
            <text:p/>
          </table:table-cell>
          <table:table-cell table:number-columns-repeated="3"/>
          <table:table-cell table:formula="of:=SUM([.G154];[.R154])" office:value-type="float" office:value="155" calcext:value-type="float">
            <text:p>155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W$1:.W$222];[.Y154])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6" calcext:value-type="float">
            <text:p>6325024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63250246" calcext:value-type="float">
            <text:p>6325024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formula="of:=IF(AND([.G155]=0;[.R155]&gt;0); &quot;:o&quot;; &quot;&quot;)">
            <text:p/>
          </table:table-cell>
          <table:table-cell table:number-columns-repeated="3"/>
          <table:table-cell table:formula="of:=SUM([.G155];[.R155])" office:value-type="float" office:value="146" calcext:value-type="float">
            <text:p>14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W$1:.W$222];[.Y15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50" calcext:value-type="float">
            <text:p>632402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40250" calcext:value-type="float">
            <text:p>6324025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56]=0;[.R156]&gt;0); &quot;:o&quot;; &quot;&quot;)">
            <text:p/>
          </table:table-cell>
          <table:table-cell table:number-columns-repeated="3"/>
          <table:table-cell table:formula="of:=SUM([.G156];[.R156])"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W$1:.W$222];[.Y15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7" calcext:value-type="float">
            <text:p>6325024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63250247" calcext:value-type="float">
            <text:p>632502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AND([.G157]=0;[.R157]&gt;0); &quot;:o&quot;; &quot;&quot;)">
            <text:p/>
          </table:table-cell>
          <table:table-cell table:number-columns-repeated="3"/>
          <table:table-cell table:formula="of:=SUM([.G157];[.R157])" office:value-type="float" office:value="158" calcext:value-type="float">
            <text:p>158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W$1:.W$222];[.Y15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48" calcext:value-type="float">
            <text:p>632502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3250248" calcext:value-type="float">
            <text:p>6325024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IF(AND([.G158]=0;[.R158]&gt;0); &quot;:o&quot;; &quot;&quot;)">
            <text:p/>
          </table:table-cell>
          <table:table-cell table:number-columns-repeated="3"/>
          <table:table-cell table:formula="of:=SUM([.G158];[.R158])" office:value-type="float" office:value="74" calcext:value-type="float">
            <text:p>74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W$1:.W$222];[.Y158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51" calcext:value-type="float">
            <text:p>632502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51" calcext:value-type="float">
            <text:p>632502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59]=0;[.R159]&gt;0); &quot;:o&quot;; &quot;&quot;)">
            <text:p/>
          </table:table-cell>
          <table:table-cell table:number-columns-repeated="3"/>
          <table:table-cell table:formula="of:=SUM([.G159];[.R159])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W$1:.W$222];[.Y15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53" calcext:value-type="float">
            <text:p>632502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63250253" calcext:value-type="float">
            <text:p>6325025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(AND([.G160]=0;[.R160]&gt;0); &quot;:o&quot;; &quot;&quot;)">
            <text:p/>
          </table:table-cell>
          <table:table-cell table:number-columns-repeated="3"/>
          <table:table-cell table:formula="of:=SUM([.G160];[.R160])" office:value-type="float" office:value="116" calcext:value-type="float">
            <text:p>11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W$1:.W$222];[.Y16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55" calcext:value-type="float">
            <text:p>6325025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3250255" calcext:value-type="float">
            <text:p>6325025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AND([.G161]=0;[.R161]&gt;0); &quot;:o&quot;; &quot;&quot;)">
            <text:p/>
          </table:table-cell>
          <table:table-cell table:number-columns-repeated="3"/>
          <table:table-cell table:formula="of:=SUM([.G161];[.R161])" office:value-type="float" office:value="117" calcext:value-type="float">
            <text:p>11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W$1:.W$222];[.Y161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56" calcext:value-type="float">
            <text:p>63250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63250256" calcext:value-type="float">
            <text:p>6325025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62]=0;[.R162]&gt;0); &quot;:o&quot;; &quot;&quot;)">
            <text:p/>
          </table:table-cell>
          <table:table-cell table:number-columns-repeated="3"/>
          <table:table-cell table:formula="of:=SUM([.G162];[.R162])" office:value-type="float" office:value="23" calcext:value-type="float">
            <text:p>23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W$1:.W$222];[.Y16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57" calcext:value-type="float">
            <text:p>632502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63250257" calcext:value-type="float">
            <text:p>632502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AND([.G163]=0;[.R163]&gt;0); &quot;:o&quot;; &quot;&quot;)">
            <text:p/>
          </table:table-cell>
          <table:table-cell table:number-columns-repeated="3"/>
          <table:table-cell table:formula="of:=SUM([.G163];[.R163])" office:value-type="float" office:value="99" calcext:value-type="float">
            <text:p>9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W$1:.W$222];[.Y16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63" calcext:value-type="float">
            <text:p>632502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63" calcext:value-type="float">
            <text:p>632502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64]=0;[.R164]&gt;0); &quot;:o&quot;; &quot;&quot;)">
            <text:p/>
          </table:table-cell>
          <table:table-cell table:number-columns-repeated="3"/>
          <table:table-cell table:formula="of:=SUM([.G164];[.R164])"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W$1:.W$222];[.Y164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64" calcext:value-type="float">
            <text:p>6325026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63250264" calcext:value-type="float">
            <text:p>6325026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IF(AND([.G165]=0;[.R165]&gt;0); &quot;:o&quot;; &quot;&quot;)">
            <text:p/>
          </table:table-cell>
          <table:table-cell table:number-columns-repeated="3"/>
          <table:table-cell table:formula="of:=SUM([.G165];[.R165])" office:value-type="float" office:value="117" calcext:value-type="float">
            <text:p>11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W$1:.W$222];[.Y16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68" calcext:value-type="float">
            <text:p>63250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68" calcext:value-type="float">
            <text:p>632502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66]=0;[.R166]&gt;0); &quot;:o&quot;; &quot;&quot;)">
            <text:p/>
          </table:table-cell>
          <table:table-cell table:number-columns-repeated="3"/>
          <table:table-cell table:formula="of:=SUM([.G166];[.R166])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W$1:.W$222];[.Y16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69" calcext:value-type="float">
            <text:p>632502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3250269" calcext:value-type="float">
            <text:p>63250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67]=0;[.R167]&gt;0); &quot;:o&quot;; &quot;&quot;)">
            <text:p/>
          </table:table-cell>
          <table:table-cell table:number-columns-repeated="3"/>
          <table:table-cell table:formula="of:=SUM([.G167];[.R167])" office:value-type="float" office:value="24" calcext:value-type="float">
            <text:p>24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W$1:.W$222];[.Y16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70" calcext:value-type="float">
            <text:p>632502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63250270" calcext:value-type="float">
            <text:p>6325027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AND([.G168]=0;[.R168]&gt;0); &quot;:o&quot;; &quot;&quot;)">
            <text:p/>
          </table:table-cell>
          <table:table-cell table:number-columns-repeated="3"/>
          <table:table-cell table:formula="of:=SUM([.G168];[.R168])" office:value-type="float" office:value="90" calcext:value-type="float">
            <text:p>9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W$1:.W$222];[.Y16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75" calcext:value-type="float">
            <text:p>632502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75" calcext:value-type="float">
            <text:p>632502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69]=0;[.R169]&gt;0); &quot;:o&quot;; &quot;&quot;)">
            <text:p/>
          </table:table-cell>
          <table:table-cell table:number-columns-repeated="3"/>
          <table:table-cell table:formula="of:=SUM([.G169];[.R169])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W$1:.W$222];[.Y16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87" calcext:value-type="float">
            <text:p>6324028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63240287" calcext:value-type="float">
            <text:p>6324028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IF(AND([.G170]=0;[.R170]&gt;0); &quot;:o&quot;; &quot;&quot;)">
            <text:p/>
          </table:table-cell>
          <table:table-cell table:number-columns-repeated="3"/>
          <table:table-cell table:formula="of:=SUM([.G170];[.R170])" office:value-type="float" office:value="105" calcext:value-type="float">
            <text:p>105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W$1:.W$222];[.Y17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79" calcext:value-type="float">
            <text:p>6325027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63250279" calcext:value-type="float">
            <text:p>632502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AND([.G171]=0;[.R171]&gt;0); &quot;:o&quot;; &quot;&quot;)">
            <text:p/>
          </table:table-cell>
          <table:table-cell table:number-columns-repeated="3"/>
          <table:table-cell table:formula="of:=SUM([.G171];[.R171])" office:value-type="float" office:value="34" calcext:value-type="float">
            <text:p>34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W$1:.W$222];[.Y17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88" calcext:value-type="float">
            <text:p>6324028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63240288" calcext:value-type="float">
            <text:p>6324028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AND([.G172]=0;[.R172]&gt;0); &quot;:o&quot;; &quot;&quot;)">
            <text:p/>
          </table:table-cell>
          <table:table-cell table:number-columns-repeated="3"/>
          <table:table-cell table:formula="of:=SUM([.G172];[.R172])" office:value-type="float" office:value="94" calcext:value-type="float">
            <text:p>9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W$1:.W$222];[.Y17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69" calcext:value-type="float">
            <text:p>63250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63250369" calcext:value-type="float">
            <text:p>632503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AND([.G173]=0;[.R173]&gt;0); &quot;:o&quot;; &quot;&quot;)">
            <text:p/>
          </table:table-cell>
          <table:table-cell table:number-columns-repeated="3"/>
          <table:table-cell table:formula="of:=SUM([.G173];[.R173])" office:value-type="float" office:value="29" calcext:value-type="float">
            <text:p>29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W$1:.W$222];[.Y17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82" calcext:value-type="float">
            <text:p>63250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82" calcext:value-type="float">
            <text:p>6325028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74]=0;[.R174]&gt;0); &quot;:o&quot;; &quot;&quot;)">
            <text:p/>
          </table:table-cell>
          <table:table-cell table:number-columns-repeated="3"/>
          <table:table-cell table:formula="of:=SUM([.G174];[.R174])"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W$1:.W$222];[.Y17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85" calcext:value-type="float">
            <text:p>6325028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63250285" calcext:value-type="float">
            <text:p>6325028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75]=0;[.R175]&gt;0); &quot;:o&quot;; &quot;&quot;)">
            <text:p/>
          </table:table-cell>
          <table:table-cell table:number-columns-repeated="3"/>
          <table:table-cell table:formula="of:=SUM([.G175];[.R175])" office:value-type="float" office:value="31" calcext:value-type="float">
            <text:p>3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W$1:.W$222];[.Y17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86" calcext:value-type="float">
            <text:p>6325028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63250286" calcext:value-type="float">
            <text:p>6325028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AND([.G176]=0;[.R176]&gt;0); &quot;:o&quot;; &quot;&quot;)">
            <text:p/>
          </table:table-cell>
          <table:table-cell table:number-columns-repeated="3"/>
          <table:table-cell table:formula="of:=SUM([.G176];[.R176])" office:value-type="float" office:value="168" calcext:value-type="float">
            <text:p>168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W$1:.W$222];[.Y17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27" calcext:value-type="float">
            <text:p>6325042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63250427" calcext:value-type="float">
            <text:p>632504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77]=0;[.R177]&gt;0); &quot;:o&quot;; &quot;&quot;)">
            <text:p/>
          </table:table-cell>
          <table:table-cell table:number-columns-repeated="3"/>
          <table:table-cell table:formula="of:=SUM([.G177];[.R177])" office:value-type="float" office:value="41" calcext:value-type="float">
            <text:p>41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W$1:.W$222];[.Y17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292" calcext:value-type="float">
            <text:p>6324029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63240292" calcext:value-type="float">
            <text:p>6324029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IF(AND([.G178]=0;[.R178]&gt;0); &quot;:o&quot;; &quot;&quot;)">
            <text:p/>
          </table:table-cell>
          <table:table-cell table:number-columns-repeated="3"/>
          <table:table-cell table:formula="of:=SUM([.G178];[.R178])"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W$1:.W$222];[.Y17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95" calcext:value-type="float">
            <text:p>632502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295" calcext:value-type="float">
            <text:p>6325029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79]=0;[.R179]&gt;0); &quot;:o&quot;; &quot;&quot;)">
            <text:p/>
          </table:table-cell>
          <table:table-cell table:number-columns-repeated="3"/>
          <table:table-cell table:formula="of:=SUM([.G179];[.R179])"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W$1:.W$222];[.Y179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96" calcext:value-type="float">
            <text:p>632502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63250296" calcext:value-type="float">
            <text:p>6325029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AND([.G180]=0;[.R180]&gt;0); &quot;:o&quot;; &quot;&quot;)">
            <text:p/>
          </table:table-cell>
          <table:table-cell table:number-columns-repeated="3"/>
          <table:table-cell table:formula="of:=SUM([.G180];[.R180])" office:value-type="float" office:value="81" calcext:value-type="float">
            <text:p>81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W$1:.W$222];[.Y18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32" calcext:value-type="float">
            <text:p>632504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3250432" calcext:value-type="float">
            <text:p>632504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AND([.G181]=0;[.R181]&gt;0); &quot;:o&quot;; &quot;&quot;)">
            <text:p/>
          </table:table-cell>
          <table:table-cell table:number-columns-repeated="3"/>
          <table:table-cell table:formula="of:=SUM([.G181];[.R181])"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W$1:.W$222];[.Y18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299" calcext:value-type="float">
            <text:p>632502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63250299" calcext:value-type="float">
            <text:p>632502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IF(AND([.G182]=0;[.R182]&gt;0); &quot;:o&quot;; &quot;&quot;)">
            <text:p/>
          </table:table-cell>
          <table:table-cell table:number-columns-repeated="3"/>
          <table:table-cell table:formula="of:=SUM([.G182];[.R182])" office:value-type="float" office:value="89" calcext:value-type="float">
            <text:p>89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W$1:.W$222];[.Y18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00" calcext:value-type="float">
            <text:p>6325030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63250300" calcext:value-type="float">
            <text:p>632503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83]=0;[.R183]&gt;0); &quot;:o&quot;; &quot;&quot;)">
            <text:p/>
          </table:table-cell>
          <table:table-cell table:number-columns-repeated="3"/>
          <table:table-cell table:formula="of:=SUM([.G183];[.R183])" office:value-type="float" office:value="11" calcext:value-type="float">
            <text:p>1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W$1:.W$222];[.Y18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34" calcext:value-type="float">
            <text:p>632504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63250434" calcext:value-type="float">
            <text:p>632504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AND([.G184]=0;[.R184]&gt;0); &quot;:o&quot;; &quot;&quot;)">
            <text:p/>
          </table:table-cell>
          <table:table-cell table:number-columns-repeated="3"/>
          <table:table-cell table:formula="of:=SUM([.G184];[.R184])" office:value-type="float" office:value="142" calcext:value-type="float">
            <text:p>14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W$1:.W$222];[.Y18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02" calcext:value-type="float">
            <text:p>6325030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63250302" calcext:value-type="float">
            <text:p>6325030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IF(AND([.G185]=0;[.R185]&gt;0); &quot;:o&quot;; &quot;&quot;)">
            <text:p/>
          </table:table-cell>
          <table:table-cell table:number-columns-repeated="3"/>
          <table:table-cell table:formula="of:=SUM([.G185];[.R185])" office:value-type="float" office:value="69" calcext:value-type="float">
            <text:p>69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W$1:.W$222];[.Y185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04" calcext:value-type="float">
            <text:p>632503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63250304" calcext:value-type="float">
            <text:p>6325030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86]=0;[.R186]&gt;0); &quot;:o&quot;; &quot;&quot;)">
            <text:p/>
          </table:table-cell>
          <table:table-cell table:number-columns-repeated="3"/>
          <table:table-cell table:formula="of:=SUM([.G186];[.R186])" office:value-type="float" office:value="12" calcext:value-type="float">
            <text:p>1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W$1:.W$222];[.Y18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92" calcext:value-type="float">
            <text:p>632504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492" calcext:value-type="float">
            <text:p>63250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87]=0;[.R187]&gt;0); &quot;:o&quot;; &quot;&quot;)">
            <text:p/>
          </table:table-cell>
          <table:table-cell table:number-columns-repeated="3"/>
          <table:table-cell table:formula="of:=SUM([.G187];[.R187])"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W$1:.W$222];[.Y18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10" calcext:value-type="float">
            <text:p>632503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63250310" calcext:value-type="float">
            <text:p>632503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AND([.G188]=0;[.R188]&gt;0); &quot;:o&quot;; &quot;&quot;)">
            <text:p/>
          </table:table-cell>
          <table:table-cell table:number-columns-repeated="3"/>
          <table:table-cell table:formula="of:=SUM([.G188];[.R188])" office:value-type="float" office:value="148" calcext:value-type="float">
            <text:p>148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W$1:.W$222];[.Y18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12" calcext:value-type="float">
            <text:p>632503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312" calcext:value-type="float">
            <text:p>632503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89]=0;[.R189]&gt;0); &quot;:o&quot;; &quot;&quot;)">
            <text:p/>
          </table:table-cell>
          <table:table-cell table:number-columns-repeated="3"/>
          <table:table-cell table:formula="of:=SUM([.G189];[.R189])"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W$1:.W$222];[.Y18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16" calcext:value-type="float">
            <text:p>632503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63250316" calcext:value-type="float">
            <text:p>632503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IF(AND([.G190]=0;[.R190]&gt;0); &quot;:o&quot;; &quot;&quot;)">
            <text:p/>
          </table:table-cell>
          <table:table-cell table:number-columns-repeated="3"/>
          <table:table-cell table:formula="of:=SUM([.G190];[.R190])" office:value-type="float" office:value="153" calcext:value-type="float">
            <text:p>15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W$1:.W$222];[.Y19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0" calcext:value-type="float">
            <text:p>632503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63250320" calcext:value-type="float">
            <text:p>632503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F(AND([.G191]=0;[.R191]&gt;0); &quot;:o&quot;; &quot;&quot;)">
            <text:p/>
          </table:table-cell>
          <table:table-cell table:number-columns-repeated="3"/>
          <table:table-cell table:formula="of:=SUM([.G191];[.R191])" office:value-type="float" office:value="104" calcext:value-type="float">
            <text:p>10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W$1:.W$222];[.Y19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1" calcext:value-type="float">
            <text:p>632503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3250321" calcext:value-type="float">
            <text:p>632503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AND([.G192]=0;[.R192]&gt;0); &quot;:o&quot;; &quot;&quot;)">
            <text:p/>
          </table:table-cell>
          <table:table-cell table:number-columns-repeated="3"/>
          <table:table-cell table:formula="of:=SUM([.G192];[.R192])" office:value-type="float" office:value="59" calcext:value-type="float">
            <text:p>59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W$1:.W$222];[.Y19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2" calcext:value-type="float">
            <text:p>632503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63250322" calcext:value-type="float">
            <text:p>632503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93]=0;[.R193]&gt;0); &quot;:o&quot;; &quot;&quot;)">
            <text:p/>
          </table:table-cell>
          <table:table-cell table:number-columns-repeated="3"/>
          <table:table-cell table:formula="of:=SUM([.G193];[.R193])" office:value-type="float" office:value="41" calcext:value-type="float">
            <text:p>41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W$1:.W$222];[.Y193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5" calcext:value-type="float">
            <text:p>632503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63250325" calcext:value-type="float">
            <text:p>632503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formula="of:=IF(AND([.G194]=0;[.R194]&gt;0); &quot;:o&quot;; &quot;&quot;)">
            <text:p/>
          </table:table-cell>
          <table:table-cell table:number-columns-repeated="3"/>
          <table:table-cell table:formula="of:=SUM([.G194];[.R194])" office:value-type="float" office:value="185" calcext:value-type="float">
            <text:p>185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W$1:.W$222];[.Y19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4" calcext:value-type="float">
            <text:p>632503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63250324" calcext:value-type="float">
            <text:p>632503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IF(AND([.G195]=0;[.R195]&gt;0); &quot;:o&quot;; &quot;&quot;)">
            <text:p/>
          </table:table-cell>
          <table:table-cell table:number-columns-repeated="3"/>
          <table:table-cell table:formula="of:=SUM([.G195];[.R195])" office:value-type="float" office:value="115" calcext:value-type="float">
            <text:p>115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W$1:.W$222];[.Y19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7" calcext:value-type="float">
            <text:p>632503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63250327" calcext:value-type="float">
            <text:p>632503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96]=0;[.R196]&gt;0); &quot;:o&quot;; &quot;&quot;)">
            <text:p/>
          </table:table-cell>
          <table:table-cell table:number-columns-repeated="3"/>
          <table:table-cell table:formula="of:=SUM([.G196];[.R196])" office:value-type="float" office:value="32" calcext:value-type="float">
            <text:p>3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W$1:.W$222];[.Y19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28" calcext:value-type="float">
            <text:p>632503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63250328" calcext:value-type="float">
            <text:p>632503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IF(AND([.G197]=0;[.R197]&gt;0); &quot;:o&quot;; &quot;&quot;)">
            <text:p/>
          </table:table-cell>
          <table:table-cell table:number-columns-repeated="3"/>
          <table:table-cell table:formula="of:=SUM([.G197];[.R197])" office:value-type="float" office:value="72" calcext:value-type="float">
            <text:p>72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W$1:.W$222];[.Y19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0" calcext:value-type="float">
            <text:p>632503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63250330" calcext:value-type="float">
            <text:p>632503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AND([.G198]=0;[.R198]&gt;0); &quot;:o&quot;; &quot;&quot;)">
            <text:p/>
          </table:table-cell>
          <table:table-cell table:number-columns-repeated="3"/>
          <table:table-cell table:formula="of:=SUM([.G198];[.R198])" office:value-type="float" office:value="80" calcext:value-type="float">
            <text:p>8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W$1:.W$222];[.Y19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1" calcext:value-type="float">
            <text:p>632503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331" calcext:value-type="float">
            <text:p>632503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199]=0;[.R199]&gt;0); &quot;:o&quot;; &quot;&quot;)">
            <text:p/>
          </table:table-cell>
          <table:table-cell table:number-columns-repeated="3"/>
          <table:table-cell table:formula="of:=SUM([.G199];[.R199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W$1:.W$222];[.Y19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2" calcext:value-type="float">
            <text:p>632503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3250332" calcext:value-type="float">
            <text:p>6325033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0]=0;[.R200]&gt;0); &quot;:o&quot;; &quot;&quot;)">
            <text:p/>
          </table:table-cell>
          <table:table-cell table:number-columns-repeated="3"/>
          <table:table-cell table:formula="of:=SUM([.G200];[.R200])" office:value-type="float" office:value="26" calcext:value-type="float">
            <text:p>26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W$1:.W$222];[.Y20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3" calcext:value-type="float">
            <text:p>6325033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3250333" calcext:value-type="float">
            <text:p>632503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1]=0;[.R201]&gt;0); &quot;:o&quot;; &quot;&quot;)">
            <text:p/>
          </table:table-cell>
          <table:table-cell table:number-columns-repeated="3"/>
          <table:table-cell table:formula="of:=SUM([.G201];[.R201])" office:value-type="float" office:value="6" calcext:value-type="float">
            <text:p>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W$1:.W$222];[.Y20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493" calcext:value-type="float">
            <text:p>63240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40493" calcext:value-type="float">
            <text:p>632404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2]=0;[.R202]&gt;0); &quot;:o&quot;; &quot;&quot;)">
            <text:p/>
          </table:table-cell>
          <table:table-cell table:number-columns-repeated="3"/>
          <table:table-cell table:formula="of:=SUM([.G202];[.R202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W$1:.W$222];[.Y20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40" calcext:value-type="float">
            <text:p>6324034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3240340" calcext:value-type="float">
            <text:p>6324034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AND([.G203]=0;[.R203]&gt;0); &quot;:o&quot;; &quot;&quot;)">
            <text:p/>
          </table:table-cell>
          <table:table-cell table:number-columns-repeated="3"/>
          <table:table-cell table:formula="of:=SUM([.G203];[.R203])" office:value-type="float" office:value="120" calcext:value-type="float">
            <text:p>12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W$1:.W$222];[.Y20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4" calcext:value-type="float">
            <text:p>6325033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63250334" calcext:value-type="float">
            <text:p>632503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IF(AND([.G204]=0;[.R204]&gt;0); &quot;:o&quot;; &quot;&quot;)">
            <text:p/>
          </table:table-cell>
          <table:table-cell table:number-columns-repeated="3"/>
          <table:table-cell table:formula="of:=SUM([.G204];[.R204])" office:value-type="float" office:value="91" calcext:value-type="float">
            <text:p>91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W$1:.W$222];[.Y20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5" calcext:value-type="float">
            <text:p>6325033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3250335" calcext:value-type="float">
            <text:p>632503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IF(AND([.G205]=0;[.R205]&gt;0); &quot;:o&quot;; &quot;&quot;)">
            <text:p/>
          </table:table-cell>
          <table:table-cell table:number-columns-repeated="3"/>
          <table:table-cell table:formula="of:=SUM([.G205];[.R205])" office:value-type="float" office:value="88" calcext:value-type="float">
            <text:p>8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W$1:.W$222];[.Y20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36" calcext:value-type="float">
            <text:p>632503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63250336" calcext:value-type="float">
            <text:p>632503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IF(AND([.G206]=0;[.R206]&gt;0); &quot;:o&quot;; &quot;&quot;)">
            <text:p/>
          </table:table-cell>
          <table:table-cell table:number-columns-repeated="3"/>
          <table:table-cell table:formula="of:=SUM([.G206];[.R206])" office:value-type="float" office:value="75" calcext:value-type="float">
            <text:p>7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W$1:.W$222];[.Y20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42" calcext:value-type="float">
            <text:p>632503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342" calcext:value-type="float">
            <text:p>632503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7]=0;[.R207]&gt;0); &quot;:o&quot;; &quot;&quot;)">
            <text:p/>
          </table:table-cell>
          <table:table-cell table:number-columns-repeated="3"/>
          <table:table-cell table:formula="of:=SUM([.G207];[.R207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W$1:.W$222];[.Y20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43" calcext:value-type="float">
            <text:p>632503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63250343" calcext:value-type="float">
            <text:p>632503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8]=0;[.R208]&gt;0); &quot;:o&quot;; &quot;&quot;)">
            <text:p/>
          </table:table-cell>
          <table:table-cell table:number-columns-repeated="3"/>
          <table:table-cell table:formula="of:=SUM([.G208];[.R208])" office:value-type="float" office:value="23" calcext:value-type="float">
            <text:p>23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W$1:.W$222];[.Y20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48" calcext:value-type="float">
            <text:p>632503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63250348" calcext:value-type="float">
            <text:p>632503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09]=0;[.R209]&gt;0); &quot;:o&quot;; &quot;&quot;)">
            <text:p/>
          </table:table-cell>
          <table:table-cell table:number-columns-repeated="3"/>
          <table:table-cell table:formula="of:=SUM([.G209];[.R209])" office:value-type="float" office:value="19" calcext:value-type="float">
            <text:p>19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W$1:.W$222];[.Y20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50" calcext:value-type="float">
            <text:p>632403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40350" calcext:value-type="float">
            <text:p>6324035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10]=0;[.R210]&gt;0); &quot;:o&quot;; &quot;&quot;)">
            <text:p/>
          </table:table-cell>
          <table:table-cell table:number-columns-repeated="3"/>
          <table:table-cell table:formula="of:=SUM([.G210];[.R210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W$1:.W$222];[.Y21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51" calcext:value-type="float">
            <text:p>632403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63240351" calcext:value-type="float">
            <text:p>6324035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formula="of:=IF(AND([.G211]=0;[.R211]&gt;0); &quot;:o&quot;; &quot;&quot;)">
            <text:p/>
          </table:table-cell>
          <table:table-cell table:number-columns-repeated="3"/>
          <table:table-cell table:formula="of:=SUM([.G211];[.R211])" office:value-type="float" office:value="131" calcext:value-type="float">
            <text:p>13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W$1:.W$222];[.Y21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52" calcext:value-type="float">
            <text:p>6325035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63250352" calcext:value-type="float">
            <text:p>632503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IF(AND([.G212]=0;[.R212]&gt;0); &quot;:o&quot;; &quot;&quot;)">
            <text:p/>
          </table:table-cell>
          <table:table-cell table:number-columns-repeated="3"/>
          <table:table-cell table:formula="of:=SUM([.G212];[.R212])" office:value-type="float" office:value="121" calcext:value-type="float">
            <text:p>12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W$1:.W$222];[.Y21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53" calcext:value-type="float">
            <text:p>6325035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3250353" calcext:value-type="float">
            <text:p>6325035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IF(AND([.G213]=0;[.R213]&gt;0); &quot;:o&quot;; &quot;&quot;)">
            <text:p/>
          </table:table-cell>
          <table:table-cell table:number-columns-repeated="3"/>
          <table:table-cell table:formula="of:=SUM([.G213];[.R213])" office:value-type="float" office:value="109" calcext:value-type="float">
            <text:p>109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W$1:.W$222];[.Y21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56" calcext:value-type="float">
            <text:p>6325035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63250356" calcext:value-type="float">
            <text:p>6325035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formula="of:=IF(AND([.G214]=0;[.R214]&gt;0); &quot;:o&quot;; &quot;&quot;)">
            <text:p/>
          </table:table-cell>
          <table:table-cell table:number-columns-repeated="3"/>
          <table:table-cell table:formula="of:=SUM([.G214];[.R214])" office:value-type="float" office:value="192" calcext:value-type="float">
            <text:p>192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W$1:.W$222];[.Y21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57" calcext:value-type="float">
            <text:p>6325035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63250357" calcext:value-type="float">
            <text:p>6325035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IF(AND([.G215]=0;[.R215]&gt;0); &quot;:o&quot;; &quot;&quot;)">
            <text:p/>
          </table:table-cell>
          <table:table-cell table:number-columns-repeated="3"/>
          <table:table-cell table:formula="of:=SUM([.G215];[.R215])" office:value-type="float" office:value="136" calcext:value-type="float">
            <text:p>136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W$1:.W$222];[.Y21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58" calcext:value-type="float">
            <text:p>6325035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63250358" calcext:value-type="float">
            <text:p>632503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AND([.G216]=0;[.R216]&gt;0); &quot;:o&quot;; &quot;&quot;)">
            <text:p/>
          </table:table-cell>
          <table:table-cell table:number-columns-repeated="3"/>
          <table:table-cell table:formula="of:=SUM([.G216];[.R216])" office:value-type="float" office:value="83" calcext:value-type="float">
            <text:p>83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W$1:.W$222];[.Y21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61" calcext:value-type="float">
            <text:p>632503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361" calcext:value-type="float">
            <text:p>632503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17]=0;[.R217]&gt;0); &quot;:o&quot;; &quot;&quot;)">
            <text:p/>
          </table:table-cell>
          <table:table-cell table:number-columns-repeated="3"/>
          <table:table-cell table:formula="of:=SUM([.G217];[.R217])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W$1:.W$222];[.Y21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41" calcext:value-type="float">
            <text:p>6325044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63250441" calcext:value-type="float">
            <text:p>632504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18]=0;[.R218]&gt;0); &quot;:o&quot;; &quot;&quot;)">
            <text:p/>
          </table:table-cell>
          <table:table-cell table:number-columns-repeated="3"/>
          <table:table-cell table:formula="of:=SUM([.G218];[.R218])" office:value-type="float" office:value="11" calcext:value-type="float">
            <text:p>1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W$1:.W$222];[.Y21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496" calcext:value-type="float">
            <text:p>632504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63250496" calcext:value-type="float">
            <text:p>632504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G219]=0;[.R219]&gt;0); &quot;:o&quot;; &quot;&quot;)">
            <text:p/>
          </table:table-cell>
          <table:table-cell table:number-columns-repeated="3"/>
          <table:table-cell table:formula="of:=SUM([.G219];[.R219])"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W$1:.W$222];[.Y21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40372" calcext:value-type="float">
            <text:p>632403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63240372" calcext:value-type="float">
            <text:p>6324037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IF(AND([.G220]=0;[.R220]&gt;0); &quot;:o&quot;; &quot;&quot;)">
            <text:p/>
          </table:table-cell>
          <table:table-cell table:number-columns-repeated="3"/>
          <table:table-cell table:formula="of:=SUM([.G220];[.R220])" office:value-type="float" office:value="132" calcext:value-type="float">
            <text:p>132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W$1:.W$222];[.Y22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63" calcext:value-type="float">
            <text:p>632503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3250363" calcext:value-type="float">
            <text:p>6325036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AND([.G221]=0;[.R221]&gt;0); &quot;:o&quot;; &quot;&quot;)">
            <text:p/>
          </table:table-cell>
          <table:table-cell table:number-columns-repeated="3"/>
          <table:table-cell table:formula="of:=SUM([.G221];[.R221])" office:value-type="float" office:value="78" calcext:value-type="float">
            <text:p>78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W$1:.W$222];[.Y22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office:value-type="float" office:value="63250364" calcext:value-type="float">
            <text:p>632503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3250364" calcext:value-type="float">
            <text:p>632503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(AND([.G222]=0;[.R222]&gt;0); &quot;:o&quot;; &quot;&quot;)">
            <text:p/>
          </table:table-cell>
          <table:table-cell table:number-columns-repeated="3"/>
          <table:table-cell table:formula="of:=SUM([.G222];[.R222])" office:value-type="float" office:value="90" calcext:value-type="float">
            <text:p>9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W$1:.W$222];[.Y222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6"/>
          <table:table-cell table:formula="of:=AVERAGE([.G1:.G222])" office:value-type="float" office:value="35.027027027027" calcext:value-type="float">
            <text:p>35.027027027027</text:p>
          </table:table-cell>
          <table:table-cell table:number-columns-repeated="10"/>
          <table:table-cell table:formula="of:=AVERAGE([.R1:.R222])" office:value-type="float" office:value="32.4144144144144" calcext:value-type="float">
            <text:p>32.4144144144144</text:p>
          </table:table-cell>
          <table:table-cell table:style-name="Default"/>
          <table:table-cell table:number-columns-repeated="3"/>
          <table:table-cell table:formula="of:=SUM([.W1:.W222])/222" office:value-type="float" office:value="67.4414414414414" calcext:value-type="float">
            <text:p>67.4414414414414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W$1:.W$222];[.Y22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3" calcext:value-type="float">
            <text:p>223</text:p>
          </table:table-cell>
          <table:table-cell table:formula="of:=COUNTIF([.W$1:.W$222];[.Y22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4" calcext:value-type="float">
            <text:p>224</text:p>
          </table:table-cell>
          <table:table-cell table:formula="of:=COUNTIF([.W$1:.W$222];[.Y22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5" calcext:value-type="float">
            <text:p>225</text:p>
          </table:table-cell>
          <table:table-cell table:formula="of:=COUNTIF([.W$1:.W$222];[.Y22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6" calcext:value-type="float">
            <text:p>226</text:p>
          </table:table-cell>
          <table:table-cell table:formula="of:=COUNTIF([.W$1:.W$222];[.Y22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7" calcext:value-type="float">
            <text:p>227</text:p>
          </table:table-cell>
          <table:table-cell table:formula="of:=COUNTIF([.W$1:.W$222];[.Y22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8" calcext:value-type="float">
            <text:p>228</text:p>
          </table:table-cell>
          <table:table-cell table:formula="of:=COUNTIF([.W$1:.W$222];[.Y2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29" calcext:value-type="float">
            <text:p>229</text:p>
          </table:table-cell>
          <table:table-cell table:formula="of:=COUNTIF([.W$1:.W$222];[.Y23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0" calcext:value-type="float">
            <text:p>230</text:p>
          </table:table-cell>
          <table:table-cell table:formula="of:=COUNTIF([.W$1:.W$222];[.Y23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1" calcext:value-type="float">
            <text:p>231</text:p>
          </table:table-cell>
          <table:table-cell table:formula="of:=COUNTIF([.W$1:.W$222];[.Y23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2" calcext:value-type="float">
            <text:p>232</text:p>
          </table:table-cell>
          <table:table-cell table:formula="of:=COUNTIF([.W$1:.W$222];[.Y23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3" calcext:value-type="float">
            <text:p>233</text:p>
          </table:table-cell>
          <table:table-cell table:formula="of:=COUNTIF([.W$1:.W$222];[.Y23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4" calcext:value-type="float">
            <text:p>234</text:p>
          </table:table-cell>
          <table:table-cell table:formula="of:=COUNTIF([.W$1:.W$222];[.Y23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5" calcext:value-type="float">
            <text:p>235</text:p>
          </table:table-cell>
          <table:table-cell table:formula="of:=COUNTIF([.W$1:.W$222];[.Y23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6" calcext:value-type="float">
            <text:p>236</text:p>
          </table:table-cell>
          <table:table-cell table:formula="of:=COUNTIF([.W$1:.W$222];[.Y23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7" calcext:value-type="float">
            <text:p>237</text:p>
          </table:table-cell>
          <table:table-cell table:formula="of:=COUNTIF([.W$1:.W$222];[.Y23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8" calcext:value-type="float">
            <text:p>238</text:p>
          </table:table-cell>
          <table:table-cell table:formula="of:=COUNTIF([.W$1:.W$222];[.Y23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39" calcext:value-type="float">
            <text:p>239</text:p>
          </table:table-cell>
          <table:table-cell table:formula="of:=COUNTIF([.W$1:.W$222];[.Y24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0" calcext:value-type="float">
            <text:p>240</text:p>
          </table:table-cell>
          <table:table-cell table:formula="of:=COUNTIF([.W$1:.W$222];[.Y2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1" calcext:value-type="float">
            <text:p>241</text:p>
          </table:table-cell>
          <table:table-cell table:formula="of:=COUNTIF([.W$1:.W$222];[.Y2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2" calcext:value-type="float">
            <text:p>242</text:p>
          </table:table-cell>
          <table:table-cell table:formula="of:=COUNTIF([.W$1:.W$222];[.Y2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3" calcext:value-type="float">
            <text:p>243</text:p>
          </table:table-cell>
          <table:table-cell table:formula="of:=COUNTIF([.W$1:.W$222];[.Y244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4" calcext:value-type="float">
            <text:p>244</text:p>
          </table:table-cell>
          <table:table-cell table:formula="of:=COUNTIF([.W$1:.W$222];[.Y245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5" calcext:value-type="float">
            <text:p>245</text:p>
          </table:table-cell>
          <table:table-cell table:formula="of:=COUNTIF([.W$1:.W$222];[.Y246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6" calcext:value-type="float">
            <text:p>246</text:p>
          </table:table-cell>
          <table:table-cell table:formula="of:=COUNTIF([.W$1:.W$222];[.Y247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7" calcext:value-type="float">
            <text:p>247</text:p>
          </table:table-cell>
          <table:table-cell table:formula="of:=COUNTIF([.W$1:.W$222];[.Y248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8" calcext:value-type="float">
            <text:p>248</text:p>
          </table:table-cell>
          <table:table-cell table:formula="of:=COUNTIF([.W$1:.W$222];[.Y24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49" calcext:value-type="float">
            <text:p>249</text:p>
          </table:table-cell>
          <table:table-cell table:formula="of:=COUNTIF([.W$1:.W$222];[.Y250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float" office:value="250" calcext:value-type="float">
            <text:p>250</text:p>
          </table:table-cell>
          <table:table-cell table:formula="of:=COUNTIF([.W$1:.W$222];[.Y25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table:formula="of:=SUM([.Z1:.Z251])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table:formula="of:=SUM([.Z101:.Z251])"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9"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office:value-type="float" office:value="6" calcext:value-type="float">
            <text:p>6</text:p>
          </table:table-cell>
          <table:table-cell table:formula="of:=SUM([.Z101:.Z120])" office:value-type="float" office:value="26" calcext:value-type="float">
            <text:p>26</text:p>
          </table:table-cell>
          <table:table-cell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office:value-type="float" office:value="7" calcext:value-type="float">
            <text:p>7</text:p>
          </table:table-cell>
          <table:table-cell table:formula="of:=SUM([.Z121:.Z140])" office:value-type="float" office:value="19" calcext:value-type="float">
            <text:p>19</text:p>
          </table:table-cell>
          <table:table-cell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office:value-type="float" office:value="8" calcext:value-type="float">
            <text:p>8</text:p>
          </table:table-cell>
          <table:table-cell table:formula="of:=SUM([.Z141:.Z160])" office:value-type="float" office:value="11" calcext:value-type="float">
            <text:p>11</text:p>
          </table:table-cell>
          <table:table-cell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office:value-type="float" office:value="9" calcext:value-type="float">
            <text:p>9</text:p>
          </table:table-cell>
          <table:table-cell table:formula="of:=SUM([.Z161:.Z180])" office:value-type="float" office:value="5" calcext:value-type="float">
            <text:p>5</text:p>
          </table:table-cell>
          <table:table-cell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formula="of:=SUM([.Z181:.Z251])" office:value-type="float" office:value="5" calcext:value-type="float">
            <text:p>5</text:p>
          </table:table-cell>
          <table:table-cell/>
          <table:table-cell table:style-name="Default"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7"/>
          <table:table-cell table:formula="of:=SUM([.AA255:.AA259])" office:value-type="float" office:value="66" calcext:value-type="float">
            <text:p>66</text:p>
          </table:table-cell>
          <table:table-cell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9:39:00.008910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0:52:53.062589922</meta:creation-date>
    <dc:date>2026-01-19T21:04:20.834705608</dc:date>
    <meta:editing-duration>PT31M36S</meta:editing-duration>
    <meta:editing-cycles>2</meta:editing-cycles>
    <meta:generator>LibreOffice/25.8.4.2$Linux_X86_64 LibreOffice_project/580$Build-2</meta:generator>
    <meta:document-statistic meta:table-count="1" meta:cell-count="457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18cm" svg:height="10.754cm" xlink:href=".." xlink:type="simple" chart:class="chart:bar" chart:style-name="ch1">
        <chart:title svg:x="8.428cm" svg:y="0.351cm" chart:style-name="ch2">
          <text:p>1. kolokvij</text:p>
        </chart:title>
        <chart:plot-area chart:style-name="ch3" svg:x="0.382cm" svg:y="1.451cm" svg:width="18.354cm" svg:height="9.088cm">
          <chart:coordinate-region svg:x="1.026cm" svg:y="1.69cm" svg:width="17.611cm" svg:height="7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126" chart:class="chart:ba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1.J1:Sheet1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149cm" svg:height="10.771cm" xlink:href=".." xlink:type="simple" chart:class="chart:bar" chart:style-name="ch1">
        <chart:title svg:x="8.443cm" svg:y="0.351cm" chart:style-name="ch2">
          <text:p>1. kolokvij</text:p>
        </chart:title>
        <chart:subtitle svg:x="8.611cm" svg:y="1.452cm" chart:style-name="ch2">
          <text:p><text:span text:style-name="T1">brez ničel</text:span></text:p>
        </chart:subtitle>
        <chart:plot-area chart:style-name="ch3" svg:x="1.473cm" svg:y="2.428cm" svg:width="17.294cm" svg:height="7.067cm">
          <chart:coordinate-region svg:x="2.117cm" svg:y="2.667cm" svg:width="16.65cm" svg:height="5.824cm"/>
          <chart:axis chart:dimension="x" chart:name="primary-x" chart:style-name="ch4">
            <chart:title svg:x="9.628cm" svg:y="9.71cm" chart:style-name="ch2">
              <text:p><text:span text:style-name="T2">Točke</text:span></text:p>
            </chart:title>
          </chart:axis>
          <chart:axis chart:dimension="y" chart:name="primary-y" chart:style-name="ch5">
            <chart:title svg:x="0.451cm" svg:y="6.644cm" chart:style-name="ch6">
              <text:p><text:span text:style-name="T2">Študenti</text:span></text:p>
            </chart:title>
            <chart:grid chart:style-name="ch7" chart:class="major"/>
          </chart:axis>
          <chart:series chart:style-name="ch8" chart:values-cell-range-address="Sheet1.J2:Sheet1.J126" chart:class="chart:bar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395cm" svg:height="10.91cm" xlink:href=".." xlink:type="simple" chart:class="chart:bar" chart:style-name="ch1">
        <chart:title svg:x="8.566cm" svg:y="0.354cm" chart:style-name="ch2">
          <text:p>2. kolokvij</text:p>
        </chart:title>
        <chart:subtitle svg:x="8.682cm" svg:y="1.458cm" chart:style-name="ch2">
          <text:p><text:span text:style-name="T1"> brez ničel</text:span></text:p>
        </chart:subtitle>
        <chart:plot-area chart:style-name="ch3" svg:x="1.478cm" svg:y="2.437cm" svg:width="17.53cm" svg:height="7.194cm">
          <chart:coordinate-region svg:x="1.926cm" svg:y="2.676cm" svg:width="17.082cm" svg:height="5.951cm"/>
          <chart:axis chart:dimension="x" chart:name="primary-x" chart:style-name="ch4">
            <chart:title svg:x="9.751cm" svg:y="9.849cm" chart:style-name="ch2">
              <text:p><text:span text:style-name="T2">Točke</text:span></text:p>
            </chart:title>
          </chart:axis>
          <chart:axis chart:dimension="y" chart:name="primary-y" chart:style-name="ch5">
            <chart:title svg:x="0.451cm" svg:y="6.717cm" chart:style-name="ch6">
              <text:p><text:span text:style-name="T2">Študenti</text:span></text:p>
            </chart:title>
            <chart:grid chart:style-name="ch7" chart:class="major"/>
          </chart:axis>
          <chart:series chart:style-name="ch8" chart:values-cell-range-address="Sheet1.U2:Sheet1.U126" chart:class="chart:bar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2:Sheet1.U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415cm" svg:height="10.921cm" xlink:href=".." xlink:type="simple" chart:class="chart:bar" chart:style-name="ch1">
        <chart:title svg:x="8.576cm" svg:y="0.354cm" chart:style-name="ch2">
          <text:p>2. kolokvij</text:p>
        </chart:title>
        <chart:plot-area chart:style-name="ch3" svg:x="1.479cm" svg:y="1.457cm" svg:width="17.548cm" svg:height="8.185cm">
          <chart:coordinate-region svg:x="2.32cm" svg:y="1.697cm" svg:width="16.707cm" svg:height="6.941cm"/>
          <chart:axis chart:dimension="x" chart:name="primary-x" chart:style-name="ch4">
            <chart:title svg:x="9.761cm" svg:y="9.86cm" chart:style-name="ch2">
              <text:p><text:span text:style-name="T1">Točke</text:span></text:p>
            </chart:title>
          </chart:axis>
          <chart:axis chart:dimension="y" chart:name="primary-y" chart:style-name="ch5">
            <chart:title svg:x="0.451cm" svg:y="6.232cm" chart:style-name="ch6">
              <text:p><text:span text:style-name="T1">Študenti</text:span></text:p>
            </chart:title>
            <chart:grid chart:style-name="ch7" chart:class="major"/>
          </chart:axis>
          <chart:series chart:style-name="ch8" chart:values-cell-range-address="Sheet1.U1:Sheet1.U126" chart:class="chart:bar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Sheet1.U1:Sheet1.U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625cm" svg:height="11.039cm" xlink:href=".." xlink:type="simple" chart:class="chart:bar" chart:style-name="ch1">
        <chart:title svg:x="8.303cm" svg:y="0.356cm" chart:style-name="ch2">
          <text:p>Oba kolokvija</text:p>
        </chart:title>
        <chart:subtitle svg:x="8.849cm" svg:y="1.462cm" chart:style-name="ch2">
          <text:p><text:span text:style-name="T1">brez ničel</text:span></text:p>
        </chart:subtitle>
        <chart:plot-area chart:style-name="ch3" svg:x="1.483cm" svg:y="2.443cm" svg:width="17.75cm" svg:height="7.315cm">
          <chart:coordinate-region svg:x="1.931cm" svg:y="2.682cm" svg:width="17.302cm" svg:height="6.072cm"/>
          <chart:axis chart:dimension="x" chart:name="primary-x" chart:style-name="ch4">
            <chart:title svg:x="9.866cm" svg:y="9.978cm" chart:style-name="ch2">
              <text:p><text:span text:style-name="T2">Točke</text:span></text:p>
            </chart:title>
          </chart:axis>
          <chart:axis chart:dimension="y" chart:name="primary-y" chart:style-name="ch5">
            <chart:title svg:x="0.451cm" svg:y="6.783cm" chart:style-name="ch6">
              <text:p><text:span text:style-name="T2">Študenti</text:span></text:p>
            </chart:title>
            <chart:grid chart:style-name="ch7" chart:class="major"/>
          </chart:axis>
          <chart:series chart:style-name="ch8" chart:values-cell-range-address="Sheet1.Z2:Sheet1.Z251" chart:class="chart:bar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Z2:Sheet1.Z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659cm" svg:height="11.058cm" xlink:href=".." xlink:type="simple" chart:class="chart:bar" chart:style-name="ch1">
        <chart:title svg:x="8.32cm" svg:y="0.357cm" chart:style-name="ch2">
          <text:p>Oba kolokvija</text:p>
        </chart:title>
        <chart:plot-area chart:style-name="ch3" svg:x="1.484cm" svg:y="1.463cm" svg:width="17.782cm" svg:height="8.313cm">
          <chart:coordinate-region svg:x="2.128cm" svg:y="1.702cm" svg:width="17.003cm" svg:height="7.07cm"/>
          <chart:axis chart:dimension="x" chart:name="primary-x" chart:style-name="ch4">
            <chart:title svg:x="9.883cm" svg:y="9.997cm" chart:style-name="ch2">
              <text:p><text:span text:style-name="T1">Točke</text:span></text:p>
            </chart:title>
          </chart:axis>
          <chart:axis chart:dimension="y" chart:name="primary-y" chart:style-name="ch5">
            <chart:title svg:x="0.451cm" svg:y="6.302cm" chart:style-name="ch6">
              <text:p><text:span text:style-name="T1">Študenti</text:span></text:p>
            </chart:title>
            <chart:grid chart:style-name="ch7" chart:class="major"/>
          </chart:axis>
          <chart:series chart:style-name="ch8" chart:values-cell-range-address="Sheet1.Z1:Sheet1.Z251" chart:class="chart:bar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1.Z1:Sheet1.Z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